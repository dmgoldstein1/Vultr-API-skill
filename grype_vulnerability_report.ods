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7008in" fo:break-before="auto" style:use-optimal-row-height="true"/>
    </style:style>
    <style:style style:name="ro2" style:family="table-row">
      <style:table-row-properties style:row-height="0.3437in" fo:break-before="auto" style:use-optimal-row-height="true"/>
    </style:style>
    <style:style style:name="ro3" style:family="table-row">
      <style:table-row-properties style:row-height="1.1374in" fo:break-before="auto" style:use-optimal-row-height="true"/>
    </style:style>
    <style:style style:name="ro4" style:family="table-row">
      <style:table-row-properties style:row-height="2.7244in" fo:break-before="auto" style:use-optimal-row-height="true"/>
    </style:style>
    <style:style style:name="ro5" style:family="table-row">
      <style:table-row-properties style:row-height="3.9945in" fo:break-before="auto" style:use-optimal-row-height="true"/>
    </style:style>
    <style:style style:name="ro6" style:family="table-row">
      <style:table-row-properties style:row-height="1.2957in" fo:break-before="auto" style:use-optimal-row-height="true"/>
    </style:style>
    <style:style style:name="ro7" style:family="table-row">
      <style:table-row-properties style:row-height="0.9783in" fo:break-before="auto" style:use-optimal-row-height="true"/>
    </style:style>
    <style:style style:name="ro8" style:family="table-row">
      <style:table-row-properties style:row-height="0.8193in" fo:break-before="auto" style:use-optimal-row-height="true"/>
    </style:style>
    <style:style style:name="ro9" style:family="table-row">
      <style:table-row-properties style:row-height="3.5181in" fo:break-before="auto" style:use-optimal-row-height="true"/>
    </style:style>
    <style:style style:name="ro10" style:family="table-row">
      <style:table-row-properties style:row-height="2.0898in" fo:break-before="auto" style:use-optimal-row-height="true"/>
    </style:style>
    <style:style style:name="ro11" style:family="table-row">
      <style:table-row-properties style:row-height="0.661in" fo:break-before="auto" style:use-optimal-row-height="true"/>
    </style:style>
    <style:style style:name="ro12" style:family="table-row">
      <style:table-row-properties style:row-height="3.6772in" fo:break-before="auto" style:use-optimal-row-height="true"/>
    </style:style>
    <style:style style:name="ro13" style:family="table-row">
      <style:table-row-properties style:row-height="4.1528in" fo:break-before="auto" style:use-optimal-row-height="true"/>
    </style:style>
    <style:style style:name="ro14" style:family="table-row">
      <style:table-row-properties style:row-height="2.4071in" fo:break-before="auto" style:use-optimal-row-height="true"/>
    </style:style>
    <style:style style:name="ro15" style:family="table-row">
      <style:table-row-properties style:row-height="7.652in" fo:break-before="auto" style:use-optimal-row-height="true"/>
    </style:style>
    <style:style style:name="ro16" style:family="table-row">
      <style:table-row-properties style:row-height="1.6134in" fo:break-before="auto" style:use-optimal-row-height="true"/>
    </style:style>
    <style:style style:name="ro17" style:family="table-row">
      <style:table-row-properties style:row-height="3.0417in" fo:break-before="auto" style:use-optimal-row-height="true"/>
    </style:style>
    <style:style style:name="ro18" style:family="table-row">
      <style:table-row-properties style:row-height="2.8835in" fo:break-before="auto" style:use-optimal-row-height="true"/>
    </style:style>
    <style:style style:name="ro19" style:family="table-row">
      <style:table-row-properties style:row-height="4.4709in" fo:break-before="auto" style:use-optimal-row-height="true"/>
    </style:style>
    <style:style style:name="ro20" style:family="table-row">
      <style:table-row-properties style:row-height="4.3118in" fo:break-before="auto" style:use-optimal-row-height="true"/>
    </style:style>
    <style:style style:name="ro21" style:family="table-row">
      <style:table-row-properties style:row-height="2.2484in" fo:break-before="auto" style:use-optimal-row-height="true"/>
    </style:style>
    <style:style style:name="ro22" style:family="table-row">
      <style:table-row-properties style:row-height="1.4547in" fo:break-before="auto" style:use-optimal-row-height="true"/>
    </style:style>
    <style:style style:name="ro23" style:family="table-row">
      <style:table-row-properties style:row-height="18.9283in" fo:break-before="auto" style:use-optimal-row-height="true"/>
    </style:style>
    <style:style style:name="ro24" style:family="table-row">
      <style:table-row-properties style:row-height="1.772in" fo:break-before="auto" style:use-optimal-row-height="true"/>
    </style:style>
    <style:style style:name="ro25" style:family="table-row">
      <style:table-row-properties style:row-height="3.8354in" fo:break-before="auto" style:use-optimal-row-height="true"/>
    </style:style>
    <style:style style:name="ro26" style:family="table-row">
      <style:table-row-properties style:row-height="4.6362in" fo:break-before="auto" style:use-optimal-row-height="true"/>
    </style:style>
    <style:style style:name="ro27" style:family="table-row">
      <style:table-row-properties style:row-height="9.398in" fo:break-before="auto" style:use-optimal-row-height="true"/>
    </style:style>
    <style:style style:name="ro28" style:family="table-row">
      <style:table-row-properties style:row-height="9.239in" fo:break-before="auto" style:use-optimal-row-height="true"/>
    </style:style>
    <style:style style:name="ro29" style:family="table-row">
      <style:table-row-properties style:row-height="5.1118in" fo:break-before="auto" style:use-optimal-row-height="true"/>
    </style:style>
    <style:style style:name="ro30" style:family="table-row">
      <style:table-row-properties style:row-height="2.5661in" fo:break-before="auto" style:use-optimal-row-height="true"/>
    </style:style>
    <style:style style:name="ro31" style:family="table-row">
      <style:table-row-properties style:row-height="1.9307in" fo:break-before="auto" style:use-optimal-row-height="true"/>
    </style:style>
    <style:style style:name="ro32" style:family="table-row">
      <style:table-row-properties style:row-height="0.502in" fo:break-before="auto" style:use-optimal-row-height="true"/>
    </style:style>
    <style:style style:name="ro33" style:family="table-row">
      <style:table-row-properties style:row-height="5.7472in" fo:break-before="auto" style:use-optimal-row-height="true"/>
    </style:style>
    <style:style style:name="ro34" style:family="table-row">
      <style:table-row-properties style:row-height="4.7945in" fo:break-before="auto" style:use-optimal-row-height="true"/>
    </style:style>
    <style:style style:name="ro35"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normal" fo:text-shadow="none" style:text-underline-style="none" fo:font-weight="bold" style:text-underline-mode="continuous" style:text-overline-mode="continuous" style:text-line-through-mode="continuous" style:font-name-asian="Tahoma" style:font-size-asian="22pt" style:language-asian="zh" style:country-asian="CN" style:font-style-asian="normal" style:font-weight-asian="bold" style:font-name-complex="Tahoma" style:font-size-complex="2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ce3"/>
        <table:table-row table:style-name="ro1">
          <table:table-cell table:style-name="ce1" office:value-type="string" calcext:value-type="string" table:number-columns-spanned="5" table:number-rows-spanned="1">
            <text:p>Your workspace has 113 vulnerabilities.</text:p>
          </table:table-cell>
          <table:covered-table-cell table:number-columns-repeated="4" table:style-name="Default"/>
        </table:table-row>
        <table:table-row table:style-name="ro2">
          <table:table-cell table:style-name="ce2" office:value-type="string" calcext:value-type="string">
            <text:p>Vulnerability</text:p>
          </table:table-cell>
          <table:table-cell table:style-name="ce2" office:value-type="string" calcext:value-type="string">
            <text:p>Severity</text:p>
          </table:table-cell>
          <table:table-cell table:style-name="ce2" office:value-type="string" calcext:value-type="string">
            <text:p>Fixed In Version</text:p>
          </table:table-cell>
          <table:table-cell table:style-name="ce2" office:value-type="string" calcext:value-type="string">
            <text:p>Description</text:p>
          </table:table-cell>
          <table:table-cell table:style-name="Default"/>
        </table:table-row>
        <table:table-row table:style-name="ro3">
          <table:table-cell office:value-type="string" calcext:value-type="string">
            <text:p>word-wrap (1.2.3)</text:p>
          </table:table-cell>
          <table:table-cell office:value-type="string" calcext:value-type="string">
            <text:p><text:a xlink:href="https://github.com/advisories/GHSA-j8xg-fqg3-53r7" xlink:type="simple">GHSA-j8xg-fqg3-53r7</text:a></text:p>
          </table:table-cell>
          <table:table-cell office:value-type="string" calcext:value-type="string">
            <text:p>Medium</text:p>
          </table:table-cell>
          <table:table-cell office:value-type="string" calcext:value-type="string">
            <text:p>1.2.4</text:p>
          </table:table-cell>
          <table:table-cell office:value-type="string" calcext:value-type="string">
            <text:p>word-wrap vulnerable to Regular Expression Denial of Service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node-sarif-builder/yarn.lock</text:a></text:p>
          </table:table-cell>
        </table:table-row>
        <table:table-row table:style-name="ro4">
          <table:table-cell office:value-type="string" calcext:value-type="string">
            <text:p>word-wrap (1.2.3)</text:p>
          </table:table-cell>
          <table:table-cell office:value-type="string" calcext:value-type="string">
            <text:p><text:a xlink:href="https://cve.mitre.org/cgi-bin/cvename.cgi?name=CVE-2023-26115" xlink:type="simple">CVE-2023-26115</text:a></text:p>
          </table:table-cell>
          <table:table-cell office:value-type="string" calcext:value-type="string">
            <text:p>High</text:p>
          </table:table-cell>
          <table:table-cell table:style-name="ce4"/>
          <table:table-cell office:value-type="string" calcext:value-type="string">
            <text:p>All versions of the package word-wrap are vulnerable to Regular Expression Denial of Service (ReDoS) due to the usage of an insecure regular expression within the result variable.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node-sarif-builder/yarn.lock</text:a></text:p>
          </table:table-cell>
        </table:table-row>
        <table:table-row table:style-name="ro5">
          <table:table-cell office:value-type="string" calcext:value-type="string">
            <text:p>uuid (8.3.2)</text:p>
          </table:table-cell>
          <table:table-cell office:value-type="string" calcext:value-type="string">
            <text:p><text:a xlink:href="https://cve.mitre.org/cgi-bin/cvename.cgi?name=CVE-2021-3538" xlink:type="simple">CVE-2021-3538</text:a></text:p>
          </table:table-cell>
          <table:table-cell office:value-type="string" calcext:value-type="string">
            <text:p>Critical</text:p>
          </table:table-cell>
          <table:table-cell table:style-name="ce4"/>
          <table:table-cell office:value-type="string" calcext:value-type="string">
            <text:p>A flaw was found in github.com/satori/go.uuid in versions from commit 0ef6afb2f6cdd6cdaeee3885a95099c63f18fc8c to d91630c8510268e75203009fe7daf2b8e1d60c45. Due to insecure randomness in the g.rand.Read function the generated UUIDs are predictable for an attacker.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node-sarif-builder/yarn.lock</text:a></text:p>
          </table:table-cell>
        </table:table-row>
        <table:table-row table:style-name="ro5">
          <table:table-cell office:value-type="string" calcext:value-type="string">
            <text:p>uuid (3.4.0)</text:p>
          </table:table-cell>
          <table:table-cell office:value-type="string" calcext:value-type="string">
            <text:p><text:a xlink:href="https://cve.mitre.org/cgi-bin/cvename.cgi?name=CVE-2021-3538" xlink:type="simple">CVE-2021-3538</text:a></text:p>
          </table:table-cell>
          <table:table-cell office:value-type="string" calcext:value-type="string">
            <text:p>Critical</text:p>
          </table:table-cell>
          <table:table-cell table:style-name="ce4"/>
          <table:table-cell office:value-type="string" calcext:value-type="string">
            <text:p>A flaw was found in github.com/satori/go.uuid in versions from commit 0ef6afb2f6cdd6cdaeee3885a95099c63f18fc8c to d91630c8510268e75203009fe7daf2b8e1d60c45. Due to insecure randomness in the g.rand.Read function the generated UUIDs are predictable for an attacker.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node-sarif-builder/yarn.lock</text:a></text:p>
          </table:table-cell>
        </table:table-row>
        <table:table-row table:style-name="ro5">
          <table:table-cell office:value-type="string" calcext:value-type="string">
            <text:p>uuid (3.1.0)</text:p>
          </table:table-cell>
          <table:table-cell office:value-type="string" calcext:value-type="string">
            <text:p><text:a xlink:href="https://cve.mitre.org/cgi-bin/cvename.cgi?name=CVE-2021-3538" xlink:type="simple">CVE-2021-3538</text:a></text:p>
          </table:table-cell>
          <table:table-cell office:value-type="string" calcext:value-type="string">
            <text:p>Critical</text:p>
          </table:table-cell>
          <table:table-cell table:style-name="ce4"/>
          <table:table-cell office:value-type="string" calcext:value-type="string">
            <text:p>A flaw was found in github.com/satori/go.uuid in versions from commit 0ef6afb2f6cdd6cdaeee3885a95099c63f18fc8c to d91630c8510268e75203009fe7daf2b8e1d60c45. Due to insecure randomness in the g.rand.Read function the generated UUIDs are predictable for an attacker.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5">
          <table:table-cell office:value-type="string" calcext:value-type="string">
            <text:p>uuid (2.3.0)</text:p>
          </table:table-cell>
          <table:table-cell office:value-type="string" calcext:value-type="string">
            <text:p><text:a xlink:href="https://cve.mitre.org/cgi-bin/cvename.cgi?name=CVE-2021-3538" xlink:type="simple">CVE-2021-3538</text:a></text:p>
          </table:table-cell>
          <table:table-cell office:value-type="string" calcext:value-type="string">
            <text:p>Critical</text:p>
          </table:table-cell>
          <table:table-cell table:style-name="ce4"/>
          <table:table-cell office:value-type="string" calcext:value-type="string">
            <text:p>A flaw was found in github.com/satori/go.uuid in versions from commit 0ef6afb2f6cdd6cdaeee3885a95099c63f18fc8c to d91630c8510268e75203009fe7daf2b8e1d60c45. Due to insecure randomness in the g.rand.Read function the generated UUIDs are predictable for an attacker.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node-sarif-builder/yarn.lock</text:a></text:p>
          </table:table-cell>
        </table:table-row>
        <table:table-row table:style-name="ro6">
          <table:table-cell office:value-type="string" calcext:value-type="string">
            <text:p>uglify-js (https://registry.npmjs.org/uglify-js/-/uglify-js-2.8.29.tgz)</text:p>
          </table:table-cell>
          <table:table-cell office:value-type="string" calcext:value-type="string">
            <text:p><text:a xlink:href="https://github.com/advisories/GHSA-34r7-q49f-h37c" xlink:type="simple">GHSA-34r7-q49f-h37c</text:a></text:p>
          </table:table-cell>
          <table:table-cell office:value-type="string" calcext:value-type="string">
            <text:p>Critical</text:p>
          </table:table-cell>
          <table:table-cell office:value-type="string" calcext:value-type="string">
            <text:p>2.4.24</text:p>
          </table:table-cell>
          <table:table-cell office:value-type="string" calcext:value-type="string">
            <text:p>Incorrect Handling of Non-Boolean Comparisons During Minification in uglify-j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7">
          <table:table-cell office:value-type="string" calcext:value-type="string">
            <text:p>uglify-js (https://registry.npmjs.org/uglify-js/-/uglify-js-2.8.29.tgz)</text:p>
          </table:table-cell>
          <table:table-cell office:value-type="string" calcext:value-type="string">
            <text:p><text:a xlink:href="https://github.com/advisories/GHSA-c9f4-xj24-8jqx" xlink:type="simple">GHSA-c9f4-xj24-8jqx</text:a></text:p>
          </table:table-cell>
          <table:table-cell office:value-type="string" calcext:value-type="string">
            <text:p>High</text:p>
          </table:table-cell>
          <table:table-cell office:value-type="string" calcext:value-type="string">
            <text:p>2.6.0</text:p>
          </table:table-cell>
          <table:table-cell office:value-type="string" calcext:value-type="string">
            <text:p>Regular Expression Denial of Service in uglify-j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4">
          <table:table-cell office:value-type="string" calcext:value-type="string">
            <text:p>typescript (4.5.4)</text:p>
          </table:table-cell>
          <table:table-cell office:value-type="string" calcext:value-type="string">
            <text:p><text:a xlink:href="https://cve.mitre.org/cgi-bin/cvename.cgi?name=CVE-2020-1416" xlink:type="simple">CVE-2020-1416</text:a></text:p>
          </table:table-cell>
          <table:table-cell office:value-type="string" calcext:value-type="string">
            <text:p>High</text:p>
          </table:table-cell>
          <table:table-cell table:style-name="ce4"/>
          <table:table-cell office:value-type="string" calcext:value-type="string">
            <text:p>An elevation of privilege vulnerability exists in Visual Studio and Visual Studio Code when they load software dependencies, aka 'Visual Studio and Visual Studio Code Elevation of Privilege Vulnerability'.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node-sarif-builder/yarn.lock</text:a></text:p>
          </table:table-cell>
        </table:table-row>
        <table:table-row table:style-name="ro8">
          <table:table-cell office:value-type="string" calcext:value-type="string">
            <text:p>tunnel-agent (0.4.3)</text:p>
          </table:table-cell>
          <table:table-cell office:value-type="string" calcext:value-type="string">
            <text:p><text:a xlink:href="https://github.com/advisories/GHSA-xc7v-wxcw-j472" xlink:type="simple">GHSA-xc7v-wxcw-j472</text:a></text:p>
          </table:table-cell>
          <table:table-cell office:value-type="string" calcext:value-type="string">
            <text:p>Medium</text:p>
          </table:table-cell>
          <table:table-cell office:value-type="string" calcext:value-type="string">
            <text:p>0.6.0</text:p>
          </table:table-cell>
          <table:table-cell office:value-type="string" calcext:value-type="string">
            <text:p>Memory Exposure in tunnel-agent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8">
          <table:table-cell office:value-type="string" calcext:value-type="string">
            <text:p>tough-cookie (2.3.3)</text:p>
          </table:table-cell>
          <table:table-cell office:value-type="string" calcext:value-type="string">
            <text:p><text:a xlink:href="https://github.com/advisories/GHSA-72xf-g2v4-qvf3" xlink:type="simple">GHSA-72xf-g2v4-qvf3</text:a></text:p>
          </table:table-cell>
          <table:table-cell office:value-type="string" calcext:value-type="string">
            <text:p>Medium</text:p>
          </table:table-cell>
          <table:table-cell office:value-type="string" calcext:value-type="string">
            <text:p>4.1.3</text:p>
          </table:table-cell>
          <table:table-cell office:value-type="string" calcext:value-type="string">
            <text:p>tough-cookie Prototype Pollution vulnerability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9">
          <table:table-cell office:value-type="string" calcext:value-type="string">
            <text:p>tough-cookie (2.3.3)</text:p>
          </table:table-cell>
          <table:table-cell office:value-type="string" calcext:value-type="string">
            <text:p><text:a xlink:href="https://cve.mitre.org/cgi-bin/cvename.cgi?name=CVE-2023-26136" xlink:type="simple">CVE-2023-26136</text:a></text:p>
          </table:table-cell>
          <table:table-cell office:value-type="string" calcext:value-type="string">
            <text:p>Critical</text:p>
          </table:table-cell>
          <table:table-cell table:style-name="ce4"/>
          <table:table-cell office:value-type="string" calcext:value-type="string">
            <text:p>Versions of the package tough-cookie before 4.1.3 are vulnerable to Prototype Pollution due to improper handling of Cookies when using CookieJar in rejectPublicSuffixes=false mode. This issue arises from the manner in which the objects are initialized.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0">
          <table:table-cell office:value-type="string" calcext:value-type="string">
            <text:p>through (2.3.8)</text:p>
          </table:table-cell>
          <table:table-cell office:value-type="string" calcext:value-type="string">
            <text:p><text:a xlink:href="https://cve.mitre.org/cgi-bin/cvename.cgi?name=CVE-2021-29940" xlink:type="simple">CVE-2021-29940</text:a></text:p>
          </table:table-cell>
          <table:table-cell office:value-type="string" calcext:value-type="string">
            <text:p>Critical</text:p>
          </table:table-cell>
          <table:table-cell table:style-name="ce4"/>
          <table:table-cell office:value-type="string" calcext:value-type="string">
            <text:p>An issue was discovered in the through crate through 2021-02-18 for Rust. There is a double free (in through and through_and) upon a panic of the map function.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1">
          <table:table-cell office:value-type="string" calcext:value-type="string">
            <text:p>stringstream (0.0.5)</text:p>
          </table:table-cell>
          <table:table-cell office:value-type="string" calcext:value-type="string">
            <text:p><text:a xlink:href="https://github.com/advisories/GHSA-mf6x-7mm4-x2g7" xlink:type="simple">GHSA-mf6x-7mm4-x2g7</text:a></text:p>
          </table:table-cell>
          <table:table-cell office:value-type="string" calcext:value-type="string">
            <text:p>Medium</text:p>
          </table:table-cell>
          <table:table-cell office:value-type="string" calcext:value-type="string">
            <text:p>0.0.6</text:p>
          </table:table-cell>
          <table:table-cell office:value-type="string" calcext:value-type="string">
            <text:p>Out-of-bounds Read in stringstream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7">
          <table:table-cell office:value-type="string" calcext:value-type="string">
            <text:p>sshpk (1.13.1)</text:p>
          </table:table-cell>
          <table:table-cell office:value-type="string" calcext:value-type="string">
            <text:p><text:a xlink:href="https://github.com/advisories/GHSA-2m39-62fm-q8r3" xlink:type="simple">GHSA-2m39-62fm-q8r3</text:a></text:p>
          </table:table-cell>
          <table:table-cell office:value-type="string" calcext:value-type="string">
            <text:p>High</text:p>
          </table:table-cell>
          <table:table-cell office:value-type="string" calcext:value-type="string">
            <text:p>1.13.2</text:p>
          </table:table-cell>
          <table:table-cell office:value-type="string" calcext:value-type="string">
            <text:p>Regular Expression Denial of Service in sshpk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3">
          <table:table-cell office:value-type="string" calcext:value-type="string">
            <text:p>sshpk (1.13.1)</text:p>
          </table:table-cell>
          <table:table-cell office:value-type="string" calcext:value-type="string">
            <text:p><text:a xlink:href="https://cve.mitre.org/cgi-bin/cvename.cgi?name=CVE-2018-3737" xlink:type="simple">CVE-2018-3737</text:a></text:p>
          </table:table-cell>
          <table:table-cell office:value-type="string" calcext:value-type="string">
            <text:p>High</text:p>
          </table:table-cell>
          <table:table-cell table:style-name="ce4"/>
          <table:table-cell office:value-type="string" calcext:value-type="string">
            <text:p>sshpk is vulnerable to ReDoS when parsing crafted invalid public key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2">
          <table:table-cell office:value-type="string" calcext:value-type="string">
            <text:p>slash (4.0.0)</text:p>
          </table:table-cell>
          <table:table-cell office:value-type="string" calcext:value-type="string">
            <text:p><text:a xlink:href="https://cve.mitre.org/cgi-bin/cvename.cgi?name=CVE-2002-1647" xlink:type="simple">CVE-2002-1647</text:a></text:p>
          </table:table-cell>
          <table:table-cell office:value-type="string" calcext:value-type="string">
            <text:p>Medium</text:p>
          </table:table-cell>
          <table:table-cell table:style-name="ce4"/>
          <table:table-cell office:value-type="string" calcext:value-type="string">
            <text:p>The quick login feature in Slash Slashcode does not redirect the user to an alternate URL when the wrong password is provided, which makes it easier for remote web sites to guess the proper passwords by reading the username and password from the Referrer URL.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node-sarif-builder/yarn.lock</text:a></text:p>
          </table:table-cell>
        </table:table-row>
        <table:table-row table:style-name="ro12">
          <table:table-cell office:value-type="string" calcext:value-type="string">
            <text:p>slash (3.0.0)</text:p>
          </table:table-cell>
          <table:table-cell office:value-type="string" calcext:value-type="string">
            <text:p><text:a xlink:href="https://cve.mitre.org/cgi-bin/cvename.cgi?name=CVE-2002-1647" xlink:type="simple">CVE-2002-1647</text:a></text:p>
          </table:table-cell>
          <table:table-cell office:value-type="string" calcext:value-type="string">
            <text:p>Medium</text:p>
          </table:table-cell>
          <table:table-cell table:style-name="ce4"/>
          <table:table-cell office:value-type="string" calcext:value-type="string">
            <text:p>The quick login feature in Slash Slashcode does not redirect the user to an alternate URL when the wrong password is provided, which makes it easier for remote web sites to guess the proper passwords by reading the username and password from the Referrer URL.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node-sarif-builder/yarn.lock</text:a></text:p>
          </table:table-cell>
        </table:table-row>
        <table:table-row table:style-name="ro12">
          <table:table-cell office:value-type="string" calcext:value-type="string">
            <text:p>slash (1.0.0)</text:p>
          </table:table-cell>
          <table:table-cell office:value-type="string" calcext:value-type="string">
            <text:p><text:a xlink:href="https://cve.mitre.org/cgi-bin/cvename.cgi?name=CVE-2002-1647" xlink:type="simple">CVE-2002-1647</text:a></text:p>
          </table:table-cell>
          <table:table-cell office:value-type="string" calcext:value-type="string">
            <text:p>Medium</text:p>
          </table:table-cell>
          <table:table-cell table:style-name="ce4"/>
          <table:table-cell office:value-type="string" calcext:value-type="string">
            <text:p>The quick login feature in Slash Slashcode does not redirect the user to an alternate URL when the wrong password is provided, which makes it easier for remote web sites to guess the proper passwords by reading the username and password from the Referrer URL.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3">
          <table:table-cell office:value-type="string" calcext:value-type="string">
            <text:p>semver (7.3.5)</text:p>
          </table:table-cell>
          <table:table-cell office:value-type="string" calcext:value-type="string">
            <text:p><text:a xlink:href="https://github.com/advisories/GHSA-c2qf-rxjj-qqgw" xlink:type="simple">GHSA-c2qf-rxjj-qqgw</text:a></text:p>
          </table:table-cell>
          <table:table-cell office:value-type="string" calcext:value-type="string">
            <text:p>High</text:p>
          </table:table-cell>
          <table:table-cell office:value-type="string" calcext:value-type="string">
            <text:p>7.5.2</text:p>
          </table:table-cell>
          <table:table-cell office:value-type="string" calcext:value-type="string">
            <text:p>semver vulnerable to Regular Expression Denial of Service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node-sarif-builder/yarn.lock</text:a></text:p>
          </table:table-cell>
        </table:table-row>
        <table:table-row table:style-name="ro4">
          <table:table-cell office:value-type="string" calcext:value-type="string">
            <text:p>semver (7.3.5)</text:p>
          </table:table-cell>
          <table:table-cell office:value-type="string" calcext:value-type="string">
            <text:p><text:a xlink:href="https://cve.mitre.org/cgi-bin/cvename.cgi?name=CVE-2022-25883" xlink:type="simple">CVE-2022-25883</text:a></text:p>
          </table:table-cell>
          <table:table-cell office:value-type="string" calcext:value-type="string">
            <text:p>High</text:p>
          </table:table-cell>
          <table:table-cell table:style-name="ce4"/>
          <table:table-cell office:value-type="string" calcext:value-type="string">
            <text:p>Versions of the package semver before 7.5.2 are vulnerable to Regular Expression Denial of Service (ReDoS) via the function new Range, when untrusted user data is provided as a range.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node-sarif-builder/yarn.lock</text:a></text:p>
          </table:table-cell>
        </table:table-row>
        <table:table-row table:style-name="ro3">
          <table:table-cell office:value-type="string" calcext:value-type="string">
            <text:p>semver (6.3.0)</text:p>
          </table:table-cell>
          <table:table-cell office:value-type="string" calcext:value-type="string">
            <text:p><text:a xlink:href="https://github.com/advisories/GHSA-c2qf-rxjj-qqgw" xlink:type="simple">GHSA-c2qf-rxjj-qqgw</text:a></text:p>
          </table:table-cell>
          <table:table-cell office:value-type="string" calcext:value-type="string">
            <text:p>High</text:p>
          </table:table-cell>
          <table:table-cell office:value-type="string" calcext:value-type="string">
            <text:p>6.3.1</text:p>
          </table:table-cell>
          <table:table-cell office:value-type="string" calcext:value-type="string">
            <text:p>semver vulnerable to Regular Expression Denial of Service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node-sarif-builder/yarn.lock</text:a></text:p>
          </table:table-cell>
        </table:table-row>
        <table:table-row table:style-name="ro4">
          <table:table-cell office:value-type="string" calcext:value-type="string">
            <text:p>semver (6.3.0)</text:p>
          </table:table-cell>
          <table:table-cell office:value-type="string" calcext:value-type="string">
            <text:p><text:a xlink:href="https://cve.mitre.org/cgi-bin/cvename.cgi?name=CVE-2022-25883" xlink:type="simple">CVE-2022-25883</text:a></text:p>
          </table:table-cell>
          <table:table-cell office:value-type="string" calcext:value-type="string">
            <text:p>High</text:p>
          </table:table-cell>
          <table:table-cell table:style-name="ce4"/>
          <table:table-cell office:value-type="string" calcext:value-type="string">
            <text:p>Versions of the package semver before 7.5.2 are vulnerable to Regular Expression Denial of Service (ReDoS) via the function new Range, when untrusted user data is provided as a range.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node-sarif-builder/yarn.lock</text:a></text:p>
          </table:table-cell>
        </table:table-row>
        <table:table-row table:style-name="ro3">
          <table:table-cell office:value-type="string" calcext:value-type="string">
            <text:p>semver (5.4.1)</text:p>
          </table:table-cell>
          <table:table-cell office:value-type="string" calcext:value-type="string">
            <text:p><text:a xlink:href="https://github.com/advisories/GHSA-c2qf-rxjj-qqgw" xlink:type="simple">GHSA-c2qf-rxjj-qqgw</text:a></text:p>
          </table:table-cell>
          <table:table-cell office:value-type="string" calcext:value-type="string">
            <text:p>High</text:p>
          </table:table-cell>
          <table:table-cell office:value-type="string" calcext:value-type="string">
            <text:p>5.7.2</text:p>
          </table:table-cell>
          <table:table-cell office:value-type="string" calcext:value-type="string">
            <text:p>semver vulnerable to Regular Expression Denial of Service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4">
          <table:table-cell office:value-type="string" calcext:value-type="string">
            <text:p>semver (5.4.1)</text:p>
          </table:table-cell>
          <table:table-cell office:value-type="string" calcext:value-type="string">
            <text:p><text:a xlink:href="https://cve.mitre.org/cgi-bin/cvename.cgi?name=CVE-2022-25883" xlink:type="simple">CVE-2022-25883</text:a></text:p>
          </table:table-cell>
          <table:table-cell office:value-type="string" calcext:value-type="string">
            <text:p>High</text:p>
          </table:table-cell>
          <table:table-cell table:style-name="ce4"/>
          <table:table-cell office:value-type="string" calcext:value-type="string">
            <text:p>Versions of the package semver before 7.5.2 are vulnerable to Regular Expression Denial of Service (ReDoS) via the function new Range, when untrusted user data is provided as a range.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8">
          <table:table-cell office:value-type="string" calcext:value-type="string">
            <text:p>request (2.79.0)</text:p>
          </table:table-cell>
          <table:table-cell office:value-type="string" calcext:value-type="string">
            <text:p><text:a xlink:href="https://github.com/advisories/GHSA-p8p7-x288-28g6" xlink:type="simple">GHSA-p8p7-x288-28g6</text:a></text:p>
          </table:table-cell>
          <table:table-cell office:value-type="string" calcext:value-type="string">
            <text:p>Medium</text:p>
          </table:table-cell>
          <table:table-cell table:style-name="ce4"/>
          <table:table-cell office:value-type="string" calcext:value-type="string">
            <text:p>Server-Side Request Forgery in Request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3">
          <table:table-cell office:value-type="string" calcext:value-type="string">
            <text:p>request (2.79.0)</text:p>
          </table:table-cell>
          <table:table-cell office:value-type="string" calcext:value-type="string">
            <text:p><text:a xlink:href="https://cve.mitre.org/cgi-bin/cvename.cgi?name=CVE-2023-28155" xlink:type="simple">CVE-2023-28155</text:a></text:p>
          </table:table-cell>
          <table:table-cell office:value-type="string" calcext:value-type="string">
            <text:p>Medium</text:p>
          </table:table-cell>
          <table:table-cell table:style-name="ce4"/>
          <table:table-cell office:value-type="string" calcext:value-type="string">
            <text:p>The Request package through 2.88.1 for Node.js allows a bypass of SSRF mitigations via an attacker-controller server that does a cross-protocol redirect (HTTP to HTTPS, or HTTPS to HTTP). NOTE: This vulnerability only affects products that are no longer supported by the maintainer.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8">
          <table:table-cell office:value-type="string" calcext:value-type="string">
            <text:p>randomatic (1.1.7)</text:p>
          </table:table-cell>
          <table:table-cell office:value-type="string" calcext:value-type="string">
            <text:p><text:a xlink:href="https://github.com/advisories/GHSA-6g33-f262-xjp4" xlink:type="simple">GHSA-6g33-f262-xjp4</text:a></text:p>
          </table:table-cell>
          <table:table-cell office:value-type="string" calcext:value-type="string">
            <text:p>Medium</text:p>
          </table:table-cell>
          <table:table-cell office:value-type="string" calcext:value-type="string">
            <text:p>3.0.0</text:p>
          </table:table-cell>
          <table:table-cell office:value-type="string" calcext:value-type="string">
            <text:p>Cryptographically Weak PRNG in randomatic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4">
          <table:table-cell office:value-type="string" calcext:value-type="string">
            <text:p>randomatic (1.1.7)</text:p>
          </table:table-cell>
          <table:table-cell office:value-type="string" calcext:value-type="string">
            <text:p><text:a xlink:href="https://cve.mitre.org/cgi-bin/cvename.cgi?name=CVE-2017-16028" xlink:type="simple">CVE-2017-16028</text:a></text:p>
          </table:table-cell>
          <table:table-cell office:value-type="string" calcext:value-type="string">
            <text:p>Medium</text:p>
          </table:table-cell>
          <table:table-cell table:style-name="ce4"/>
          <table:table-cell office:value-type="string" calcext:value-type="string">
            <text:p>react-native-meteor-oauth is a library for Oauth2 login to a Meteor server in React Native. The oauth Random Token is generated using a non-cryptographically strong RNG (Math.random()).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1">
          <table:table-cell office:value-type="string" calcext:value-type="string">
            <text:p>qs (6.3.2)</text:p>
          </table:table-cell>
          <table:table-cell office:value-type="string" calcext:value-type="string">
            <text:p><text:a xlink:href="https://github.com/advisories/GHSA-hrpp-h998-j3pp" xlink:type="simple">GHSA-hrpp-h998-j3pp</text:a></text:p>
          </table:table-cell>
          <table:table-cell office:value-type="string" calcext:value-type="string">
            <text:p>High</text:p>
          </table:table-cell>
          <table:table-cell office:value-type="string" calcext:value-type="string">
            <text:p>6.3.3</text:p>
          </table:table-cell>
          <table:table-cell office:value-type="string" calcext:value-type="string">
            <text:p>qs vulnerable to Prototype Pollution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5">
          <table:table-cell office:value-type="string" calcext:value-type="string">
            <text:p>qs (6.3.2)</text:p>
          </table:table-cell>
          <table:table-cell office:value-type="string" calcext:value-type="string">
            <text:p><text:a xlink:href="https://cve.mitre.org/cgi-bin/cvename.cgi?name=CVE-2022-24999" xlink:type="simple">CVE-2022-24999</text:a></text:p>
          </table:table-cell>
          <table:table-cell office:value-type="string" calcext:value-type="string">
            <text:p>High</text:p>
          </table:table-cell>
          <table:table-cell table:style-name="ce4"/>
          <table:table-cell office:value-type="string" calcext:value-type="string">
            <text:p>qs before 6.10.3, as used in Express before 4.17.3 and other products, allows attackers to cause a Node process hang for an Express application because an __ proto__ key can be used. In many typical Express use cases, an unauthenticated remote attacker can place the attack payload in the query string of the URL that is used to visit the application, such as a[__proto__]=b&amp;a[__proto__]&amp;a[length]=100000000. The fix was backported to qs 6.9.7, 6.8.3, 6.7.3, 6.6.1, 6.5.3, 6.4.1, 6.3.3, and 6.2.4 (and therefore Express 4.17.3, which has "deps: qs@6.9.7" in its release description, is not vulnerable).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1">
          <table:table-cell office:value-type="string" calcext:value-type="string">
            <text:p>minimist (1.2.0)</text:p>
          </table:table-cell>
          <table:table-cell office:value-type="string" calcext:value-type="string">
            <text:p><text:a xlink:href="https://github.com/advisories/GHSA-vh95-rmgr-6w4m" xlink:type="simple">GHSA-vh95-rmgr-6w4m</text:a></text:p>
          </table:table-cell>
          <table:table-cell office:value-type="string" calcext:value-type="string">
            <text:p>Medium</text:p>
          </table:table-cell>
          <table:table-cell office:value-type="string" calcext:value-type="string">
            <text:p>1.2.3</text:p>
          </table:table-cell>
          <table:table-cell office:value-type="string" calcext:value-type="string">
            <text:p>Prototype Pollution in minimist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1">
          <table:table-cell office:value-type="string" calcext:value-type="string">
            <text:p>minimist (1.2.0)</text:p>
          </table:table-cell>
          <table:table-cell office:value-type="string" calcext:value-type="string">
            <text:p><text:a xlink:href="https://github.com/advisories/GHSA-xvch-5gv4-984h" xlink:type="simple">GHSA-xvch-5gv4-984h</text:a></text:p>
          </table:table-cell>
          <table:table-cell office:value-type="string" calcext:value-type="string">
            <text:p>Critical</text:p>
          </table:table-cell>
          <table:table-cell office:value-type="string" calcext:value-type="string">
            <text:p>1.2.6</text:p>
          </table:table-cell>
          <table:table-cell office:value-type="string" calcext:value-type="string">
            <text:p>Prototype Pollution in minimist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0">
          <table:table-cell office:value-type="string" calcext:value-type="string">
            <text:p>minimist (1.2.0)</text:p>
          </table:table-cell>
          <table:table-cell office:value-type="string" calcext:value-type="string">
            <text:p><text:a xlink:href="https://cve.mitre.org/cgi-bin/cvename.cgi?name=CVE-2020-7598" xlink:type="simple">CVE-2020-7598</text:a></text:p>
          </table:table-cell>
          <table:table-cell office:value-type="string" calcext:value-type="string">
            <text:p>Medium</text:p>
          </table:table-cell>
          <table:table-cell table:style-name="ce4"/>
          <table:table-cell office:value-type="string" calcext:value-type="string">
            <text:p>minimist before 1.2.2 could be tricked into adding or modifying properties of Object.prototype using a "constructor" or "__proto__" payload.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6">
          <table:table-cell office:value-type="string" calcext:value-type="string">
            <text:p>minimist (1.2.0)</text:p>
          </table:table-cell>
          <table:table-cell office:value-type="string" calcext:value-type="string">
            <text:p><text:a xlink:href="https://cve.mitre.org/cgi-bin/cvename.cgi?name=CVE-2021-44906" xlink:type="simple">CVE-2021-44906</text:a></text:p>
          </table:table-cell>
          <table:table-cell office:value-type="string" calcext:value-type="string">
            <text:p>Critical</text:p>
          </table:table-cell>
          <table:table-cell table:style-name="ce4"/>
          <table:table-cell office:value-type="string" calcext:value-type="string">
            <text:p>Minimist &lt;=1.2.5 is vulnerable to Prototype Pollution via file index.js, function setKey() (lines 69-95).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8">
          <table:table-cell office:value-type="string" calcext:value-type="string">
            <text:p>minimatch (https://registry.npmjs.org/minimatch/-/minimatch-3.0.4.tgz)</text:p>
          </table:table-cell>
          <table:table-cell office:value-type="string" calcext:value-type="string">
            <text:p><text:a xlink:href="https://github.com/advisories/GHSA-f8q6-p94x-37v3" xlink:type="simple">GHSA-f8q6-p94x-37v3</text:a></text:p>
          </table:table-cell>
          <table:table-cell office:value-type="string" calcext:value-type="string">
            <text:p>High</text:p>
          </table:table-cell>
          <table:table-cell office:value-type="string" calcext:value-type="string">
            <text:p>3.0.5</text:p>
          </table:table-cell>
          <table:table-cell office:value-type="string" calcext:value-type="string">
            <text:p>minimatch ReDoS vulnerability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7">
          <table:table-cell office:value-type="string" calcext:value-type="string">
            <text:p>minimatch (https://registry.npmjs.org/minimatch/-/minimatch-3.0.4.tgz)</text:p>
          </table:table-cell>
          <table:table-cell office:value-type="string" calcext:value-type="string">
            <text:p><text:a xlink:href="https://github.com/advisories/GHSA-hxm2-r34f-qmc5" xlink:type="simple">GHSA-hxm2-r34f-qmc5</text:a></text:p>
          </table:table-cell>
          <table:table-cell office:value-type="string" calcext:value-type="string">
            <text:p>High</text:p>
          </table:table-cell>
          <table:table-cell office:value-type="string" calcext:value-type="string">
            <text:p>3.0.2</text:p>
          </table:table-cell>
          <table:table-cell office:value-type="string" calcext:value-type="string">
            <text:p>Regular Expression Denial of Service in minimatch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2">
          <table:table-cell office:value-type="string" calcext:value-type="string">
            <text:p>minimatch (https://registry.npmjs.org/minimatch/-/minimatch-3.0.4.tgz)</text:p>
          </table:table-cell>
          <table:table-cell office:value-type="string" calcext:value-type="string">
            <text:p><text:a xlink:href="https://cve.mitre.org/cgi-bin/cvename.cgi?name=CVE-2016-10540" xlink:type="simple">CVE-2016-10540</text:a></text:p>
          </table:table-cell>
          <table:table-cell office:value-type="string" calcext:value-type="string">
            <text:p>High</text:p>
          </table:table-cell>
          <table:table-cell table:style-name="ce4"/>
          <table:table-cell office:value-type="string" calcext:value-type="string">
            <text:p>Minimatch is a minimal matching utility that works by converting glob expressions into JavaScript `RegExp` objects. The primary function, `minimatch(path, pattern)` in Minimatch 3.0.1 and earlier is vulnerable to ReDoS in the `pattern` parameter.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7">
          <table:table-cell office:value-type="string" calcext:value-type="string">
            <text:p>minimatch (https://registry.npmjs.org/minimatch/-/minimatch-3.0.4.tgz)</text:p>
          </table:table-cell>
          <table:table-cell office:value-type="string" calcext:value-type="string">
            <text:p><text:a xlink:href="https://cve.mitre.org/cgi-bin/cvename.cgi?name=CVE-2022-3517" xlink:type="simple">CVE-2022-3517</text:a></text:p>
          </table:table-cell>
          <table:table-cell office:value-type="string" calcext:value-type="string">
            <text:p>High</text:p>
          </table:table-cell>
          <table:table-cell table:style-name="ce4"/>
          <table:table-cell office:value-type="string" calcext:value-type="string">
            <text:p>A vulnerability was found in the minimatch package. This flaw allows a Regular Expression Denial of Service (ReDoS) when calling the braceExpand function with specific arguments, resulting in a Denial of Service.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3">
          <table:table-cell office:value-type="string" calcext:value-type="string">
            <text:p>micromatch (4.0.4)</text:p>
          </table:table-cell>
          <table:table-cell office:value-type="string" calcext:value-type="string">
            <text:p><text:a xlink:href="https://github.com/advisories/GHSA-952p-6rrq-rcjv" xlink:type="simple">GHSA-952p-6rrq-rcjv</text:a></text:p>
          </table:table-cell>
          <table:table-cell office:value-type="string" calcext:value-type="string">
            <text:p>Medium</text:p>
          </table:table-cell>
          <table:table-cell office:value-type="string" calcext:value-type="string">
            <text:p>4.0.8</text:p>
          </table:table-cell>
          <table:table-cell office:value-type="string" calcext:value-type="string">
            <text:p>Regular Expression Denial of Service (ReDoS) in micromatch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node-sarif-builder/yarn.lock</text:a></text:p>
          </table:table-cell>
        </table:table-row>
        <table:table-row table:style-name="ro3">
          <table:table-cell office:value-type="string" calcext:value-type="string">
            <text:p>micromatch (2.3.11)</text:p>
          </table:table-cell>
          <table:table-cell office:value-type="string" calcext:value-type="string">
            <text:p><text:a xlink:href="https://github.com/advisories/GHSA-952p-6rrq-rcjv" xlink:type="simple">GHSA-952p-6rrq-rcjv</text:a></text:p>
          </table:table-cell>
          <table:table-cell office:value-type="string" calcext:value-type="string">
            <text:p>Medium</text:p>
          </table:table-cell>
          <table:table-cell office:value-type="string" calcext:value-type="string">
            <text:p>4.0.8</text:p>
          </table:table-cell>
          <table:table-cell office:value-type="string" calcext:value-type="string">
            <text:p>Regular Expression Denial of Service (ReDoS) in micromatch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3">
          <table:table-cell office:value-type="string" calcext:value-type="string">
            <text:p>lodash (4.17.4)</text:p>
          </table:table-cell>
          <table:table-cell office:value-type="string" calcext:value-type="string">
            <text:p><text:a xlink:href="https://github.com/advisories/GHSA-29mw-wpgm-hmr9" xlink:type="simple">GHSA-29mw-wpgm-hmr9</text:a></text:p>
          </table:table-cell>
          <table:table-cell office:value-type="string" calcext:value-type="string">
            <text:p>Medium</text:p>
          </table:table-cell>
          <table:table-cell office:value-type="string" calcext:value-type="string">
            <text:p>4.17.21</text:p>
          </table:table-cell>
          <table:table-cell office:value-type="string" calcext:value-type="string">
            <text:p>Regular Expression Denial of Service (ReDoS) in lodash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1">
          <table:table-cell office:value-type="string" calcext:value-type="string">
            <text:p>lodash (4.17.4)</text:p>
          </table:table-cell>
          <table:table-cell office:value-type="string" calcext:value-type="string">
            <text:p><text:a xlink:href="https://github.com/advisories/GHSA-35jh-r3h4-6jhm" xlink:type="simple">GHSA-35jh-r3h4-6jhm</text:a></text:p>
          </table:table-cell>
          <table:table-cell office:value-type="string" calcext:value-type="string">
            <text:p>High</text:p>
          </table:table-cell>
          <table:table-cell office:value-type="string" calcext:value-type="string">
            <text:p>4.17.21</text:p>
          </table:table-cell>
          <table:table-cell office:value-type="string" calcext:value-type="string">
            <text:p>Command Injection in lodash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1">
          <table:table-cell office:value-type="string" calcext:value-type="string">
            <text:p>lodash (4.17.4)</text:p>
          </table:table-cell>
          <table:table-cell office:value-type="string" calcext:value-type="string">
            <text:p><text:a xlink:href="https://github.com/advisories/GHSA-4xc9-xhrj-v574" xlink:type="simple">GHSA-4xc9-xhrj-v574</text:a></text:p>
          </table:table-cell>
          <table:table-cell office:value-type="string" calcext:value-type="string">
            <text:p>High</text:p>
          </table:table-cell>
          <table:table-cell office:value-type="string" calcext:value-type="string">
            <text:p>4.17.11</text:p>
          </table:table-cell>
          <table:table-cell office:value-type="string" calcext:value-type="string">
            <text:p>Prototype Pollution in lodash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1">
          <table:table-cell office:value-type="string" calcext:value-type="string">
            <text:p>lodash (4.17.4)</text:p>
          </table:table-cell>
          <table:table-cell office:value-type="string" calcext:value-type="string">
            <text:p><text:a xlink:href="https://github.com/advisories/GHSA-fvqr-27wr-82fm" xlink:type="simple">GHSA-fvqr-27wr-82fm</text:a></text:p>
          </table:table-cell>
          <table:table-cell office:value-type="string" calcext:value-type="string">
            <text:p>Medium</text:p>
          </table:table-cell>
          <table:table-cell office:value-type="string" calcext:value-type="string">
            <text:p>4.17.5</text:p>
          </table:table-cell>
          <table:table-cell office:value-type="string" calcext:value-type="string">
            <text:p>Prototype Pollution in lodash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1">
          <table:table-cell office:value-type="string" calcext:value-type="string">
            <text:p>lodash (4.17.4)</text:p>
          </table:table-cell>
          <table:table-cell office:value-type="string" calcext:value-type="string">
            <text:p><text:a xlink:href="https://github.com/advisories/GHSA-jf85-cpcp-j695" xlink:type="simple">GHSA-jf85-cpcp-j695</text:a></text:p>
          </table:table-cell>
          <table:table-cell office:value-type="string" calcext:value-type="string">
            <text:p>Critical</text:p>
          </table:table-cell>
          <table:table-cell office:value-type="string" calcext:value-type="string">
            <text:p>4.17.12</text:p>
          </table:table-cell>
          <table:table-cell office:value-type="string" calcext:value-type="string">
            <text:p>Prototype Pollution in lodash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1">
          <table:table-cell office:value-type="string" calcext:value-type="string">
            <text:p>lodash (4.17.4)</text:p>
          </table:table-cell>
          <table:table-cell office:value-type="string" calcext:value-type="string">
            <text:p><text:a xlink:href="https://github.com/advisories/GHSA-p6mc-m468-83gw" xlink:type="simple">GHSA-p6mc-m468-83gw</text:a></text:p>
          </table:table-cell>
          <table:table-cell office:value-type="string" calcext:value-type="string">
            <text:p>High</text:p>
          </table:table-cell>
          <table:table-cell office:value-type="string" calcext:value-type="string">
            <text:p>4.17.19</text:p>
          </table:table-cell>
          <table:table-cell office:value-type="string" calcext:value-type="string">
            <text:p>Prototype Pollution in lodash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3">
          <table:table-cell office:value-type="string" calcext:value-type="string">
            <text:p>lodash (4.17.4)</text:p>
          </table:table-cell>
          <table:table-cell office:value-type="string" calcext:value-type="string">
            <text:p><text:a xlink:href="https://github.com/advisories/GHSA-x5rq-j2xg-h7qm" xlink:type="simple">GHSA-x5rq-j2xg-h7qm</text:a></text:p>
          </table:table-cell>
          <table:table-cell office:value-type="string" calcext:value-type="string">
            <text:p>Medium</text:p>
          </table:table-cell>
          <table:table-cell office:value-type="string" calcext:value-type="string">
            <text:p>4.17.11</text:p>
          </table:table-cell>
          <table:table-cell office:value-type="string" calcext:value-type="string">
            <text:p>Regular Expression Denial of Service (ReDoS) in lodash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8">
          <table:table-cell office:value-type="string" calcext:value-type="string">
            <text:p>lodash (4.17.4)</text:p>
          </table:table-cell>
          <table:table-cell office:value-type="string" calcext:value-type="string">
            <text:p><text:a xlink:href="https://cve.mitre.org/cgi-bin/cvename.cgi?name=CVE-2018-16487" xlink:type="simple">CVE-2018-16487</text:a></text:p>
          </table:table-cell>
          <table:table-cell office:value-type="string" calcext:value-type="string">
            <text:p>Medium</text:p>
          </table:table-cell>
          <table:table-cell table:style-name="ce4"/>
          <table:table-cell office:value-type="string" calcext:value-type="string">
            <text:p>A prototype pollution vulnerability was found in lodash &lt;4.17.11 where the functions merge, mergeWith, and defaultsDeep can be tricked into adding or modifying properties of Object.prototype.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9">
          <table:table-cell office:value-type="string" calcext:value-type="string">
            <text:p>lodash (4.17.4)</text:p>
          </table:table-cell>
          <table:table-cell office:value-type="string" calcext:value-type="string">
            <text:p><text:a xlink:href="https://cve.mitre.org/cgi-bin/cvename.cgi?name=CVE-2018-3721" xlink:type="simple">CVE-2018-3721</text:a></text:p>
          </table:table-cell>
          <table:table-cell office:value-type="string" calcext:value-type="string">
            <text:p>Medium</text:p>
          </table:table-cell>
          <table:table-cell table:style-name="ce4"/>
          <table:table-cell office:value-type="string" calcext:value-type="string">
            <text:p>lodash node module before 4.17.5 suffers from a Modification of Assumed-Immutable Data (MAID) vulnerability via defaultsDeep, merge, and mergeWith functions, which allows a malicious user to modify the prototype of "Object" via __proto__, causing the addition or modification of an existing property that will exist on all object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20">
          <table:table-cell office:value-type="string" calcext:value-type="string">
            <text:p>lodash (4.17.4)</text:p>
          </table:table-cell>
          <table:table-cell office:value-type="string" calcext:value-type="string">
            <text:p><text:a xlink:href="https://cve.mitre.org/cgi-bin/cvename.cgi?name=CVE-2019-1010266" xlink:type="simple">CVE-2019-1010266</text:a></text:p>
          </table:table-cell>
          <table:table-cell office:value-type="string" calcext:value-type="string">
            <text:p>Medium</text:p>
          </table:table-cell>
          <table:table-cell table:style-name="ce4"/>
          <table:table-cell office:value-type="string" calcext:value-type="string">
            <text:p>lodash prior to 4.17.11 is affected by: CWE-400: Uncontrolled Resource Consumption. The impact is: Denial of service. The component is: Date handler. The attack vector is: Attacker provides very long strings, which the library attempts to match using a regular expression. The fixed version is: 4.17.11.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8">
          <table:table-cell office:value-type="string" calcext:value-type="string">
            <text:p>lodash (4.17.4)</text:p>
          </table:table-cell>
          <table:table-cell office:value-type="string" calcext:value-type="string">
            <text:p><text:a xlink:href="https://cve.mitre.org/cgi-bin/cvename.cgi?name=CVE-2019-10744" xlink:type="simple">CVE-2019-10744</text:a></text:p>
          </table:table-cell>
          <table:table-cell office:value-type="string" calcext:value-type="string">
            <text:p>Critical</text:p>
          </table:table-cell>
          <table:table-cell table:style-name="ce4"/>
          <table:table-cell office:value-type="string" calcext:value-type="string">
            <text:p>Versions of lodash lower than 4.17.12 are vulnerable to Prototype Pollution. The function defaultsDeep could be tricked into adding or modifying properties of Object.prototype using a constructor payload.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21">
          <table:table-cell office:value-type="string" calcext:value-type="string">
            <text:p>lodash (4.17.4)</text:p>
          </table:table-cell>
          <table:table-cell office:value-type="string" calcext:value-type="string">
            <text:p><text:a xlink:href="https://cve.mitre.org/cgi-bin/cvename.cgi?name=CVE-2020-28500" xlink:type="simple">CVE-2020-28500</text:a></text:p>
          </table:table-cell>
          <table:table-cell office:value-type="string" calcext:value-type="string">
            <text:p>Medium</text:p>
          </table:table-cell>
          <table:table-cell table:style-name="ce4"/>
          <table:table-cell office:value-type="string" calcext:value-type="string">
            <text:p>Lodash versions prior to 4.17.21 are vulnerable to Regular Expression Denial of Service (ReDoS) via the toNumber, trim and trimEnd function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22">
          <table:table-cell office:value-type="string" calcext:value-type="string">
            <text:p>lodash (4.17.4)</text:p>
          </table:table-cell>
          <table:table-cell office:value-type="string" calcext:value-type="string">
            <text:p><text:a xlink:href="https://cve.mitre.org/cgi-bin/cvename.cgi?name=CVE-2020-8203" xlink:type="simple">CVE-2020-8203</text:a></text:p>
          </table:table-cell>
          <table:table-cell office:value-type="string" calcext:value-type="string">
            <text:p>High</text:p>
          </table:table-cell>
          <table:table-cell table:style-name="ce4"/>
          <table:table-cell office:value-type="string" calcext:value-type="string">
            <text:p>Prototype pollution attack when using _.zipObjectDeep in lodash before 4.17.20.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22">
          <table:table-cell office:value-type="string" calcext:value-type="string">
            <text:p>lodash (4.17.4)</text:p>
          </table:table-cell>
          <table:table-cell office:value-type="string" calcext:value-type="string">
            <text:p><text:a xlink:href="https://cve.mitre.org/cgi-bin/cvename.cgi?name=CVE-2021-23337" xlink:type="simple">CVE-2021-23337</text:a></text:p>
          </table:table-cell>
          <table:table-cell office:value-type="string" calcext:value-type="string">
            <text:p>High</text:p>
          </table:table-cell>
          <table:table-cell table:style-name="ce4"/>
          <table:table-cell office:value-type="string" calcext:value-type="string">
            <text:p>Lodash versions prior to 4.17.21 are vulnerable to Command Injection via the template function.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8">
          <table:table-cell office:value-type="string" calcext:value-type="string">
            <text:p>jsonpointer (4.0.1)</text:p>
          </table:table-cell>
          <table:table-cell office:value-type="string" calcext:value-type="string">
            <text:p><text:a xlink:href="https://github.com/advisories/GHSA-282f-qqgm-c34q" xlink:type="simple">GHSA-282f-qqgm-c34q</text:a></text:p>
          </table:table-cell>
          <table:table-cell office:value-type="string" calcext:value-type="string">
            <text:p>Medium</text:p>
          </table:table-cell>
          <table:table-cell office:value-type="string" calcext:value-type="string">
            <text:p>5.0.0</text:p>
          </table:table-cell>
          <table:table-cell office:value-type="string" calcext:value-type="string">
            <text:p>Prototype Pollution in node-jsonpointer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4">
          <table:table-cell office:value-type="string" calcext:value-type="string">
            <text:p>jsonpointer (4.0.1)</text:p>
          </table:table-cell>
          <table:table-cell office:value-type="string" calcext:value-type="string">
            <text:p><text:a xlink:href="https://cve.mitre.org/cgi-bin/cvename.cgi?name=CVE-2021-23807" xlink:type="simple">CVE-2021-23807</text:a></text:p>
          </table:table-cell>
          <table:table-cell office:value-type="string" calcext:value-type="string">
            <text:p>Critical</text:p>
          </table:table-cell>
          <table:table-cell table:style-name="ce4"/>
          <table:table-cell office:value-type="string" calcext:value-type="string">
            <text:p>This affects the package jsonpointer before 5.0.0. A type confusion vulnerability can lead to a bypass of a previous Prototype Pollution fix when the pointer components are array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4">
          <table:table-cell office:value-type="string" calcext:value-type="string">
            <text:p>jsonpointer (4.0.1)</text:p>
          </table:table-cell>
          <table:table-cell office:value-type="string" calcext:value-type="string">
            <text:p><text:a xlink:href="https://cve.mitre.org/cgi-bin/cvename.cgi?name=CVE-2021-23820" xlink:type="simple">CVE-2021-23820</text:a></text:p>
          </table:table-cell>
          <table:table-cell office:value-type="string" calcext:value-type="string">
            <text:p>Critical</text:p>
          </table:table-cell>
          <table:table-cell table:style-name="ce4"/>
          <table:table-cell office:value-type="string" calcext:value-type="string">
            <text:p>This affects all versions of package json-pointer. A type confusion vulnerability can lead to a bypass of CVE-2020-7709 when the pointer components are array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7">
          <table:table-cell office:value-type="string" calcext:value-type="string">
            <text:p>json5 (0.5.1)</text:p>
          </table:table-cell>
          <table:table-cell office:value-type="string" calcext:value-type="string">
            <text:p><text:a xlink:href="https://github.com/advisories/GHSA-9c47-m6qq-7p4h" xlink:type="simple">GHSA-9c47-m6qq-7p4h</text:a></text:p>
          </table:table-cell>
          <table:table-cell office:value-type="string" calcext:value-type="string">
            <text:p>High</text:p>
          </table:table-cell>
          <table:table-cell office:value-type="string" calcext:value-type="string">
            <text:p>1.0.2</text:p>
          </table:table-cell>
          <table:table-cell office:value-type="string" calcext:value-type="string">
            <text:p>Prototype Pollution in JSON5 via Parse Method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23">
          <table:table-cell office:value-type="string" calcext:value-type="string">
            <text:p>json5 (0.5.1)</text:p>
          </table:table-cell>
          <table:table-cell office:value-type="string" calcext:value-type="string">
            <text:p><text:a xlink:href="https://cve.mitre.org/cgi-bin/cvename.cgi?name=CVE-2022-46175" xlink:type="simple">CVE-2022-46175</text:a></text:p>
          </table:table-cell>
          <table:table-cell office:value-type="string" calcext:value-type="string">
            <text:p>High</text:p>
          </table:table-cell>
          <table:table-cell table:style-name="ce4"/>
          <table:table-cell office:value-type="string" calcext:value-type="string">
            <text:p>JSON5 is an extension to the popular JSON file format that aims to be easier to write and maintain by hand (e.g. for config files). The `parse` method of the JSON5 library before and including versions 1.0.1 and 2.2.1 does not restrict parsing of keys named `__proto__`, allowing specially crafted strings to pollute the prototype of the resulting object. This vulnerability pollutes the prototype of the object returned by `JSON5.parse` and not the global Object prototype, which is the commonly understood definition of Prototype Pollution. However, polluting the prototype of a single object can have significant security impact for an application if the object is later used in trusted operations. This vulnerability could allow an attacker to set arbitrary and unexpected keys on the object returned from `JSON5.parse`. The actual impact will depend on how applications utilize the returned object and how they filter unwanted keys, but could include denial of service, cross-site scripting, elevation of privilege, and in extreme cases, remote code execution. `JSON5.parse` should restrict parsing of `__proto__` keys when parsing JSON strings to objects. As a point of reference, the `JSON.parse` method included in JavaScript ignores `__proto__` keys. Simply changing `JSON5.parse` to `JSON.parse` in the examples above mitigates this vulnerability. This vulnerability is patched in json5 versions 1.0.2, 2.2.2, and later.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8">
          <table:table-cell office:value-type="string" calcext:value-type="string">
            <text:p>json-schema (0.2.3)</text:p>
          </table:table-cell>
          <table:table-cell office:value-type="string" calcext:value-type="string">
            <text:p><text:a xlink:href="https://github.com/advisories/GHSA-896r-f27r-55mw" xlink:type="simple">GHSA-896r-f27r-55mw</text:a></text:p>
          </table:table-cell>
          <table:table-cell office:value-type="string" calcext:value-type="string">
            <text:p>Critical</text:p>
          </table:table-cell>
          <table:table-cell office:value-type="string" calcext:value-type="string">
            <text:p>0.4.0</text:p>
          </table:table-cell>
          <table:table-cell office:value-type="string" calcext:value-type="string">
            <text:p>json-schema is vulnerable to Prototype Pollution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24">
          <table:table-cell office:value-type="string" calcext:value-type="string">
            <text:p>json-schema (0.2.3)</text:p>
          </table:table-cell>
          <table:table-cell office:value-type="string" calcext:value-type="string">
            <text:p><text:a xlink:href="https://cve.mitre.org/cgi-bin/cvename.cgi?name=CVE-2021-3918" xlink:type="simple">CVE-2021-3918</text:a></text:p>
          </table:table-cell>
          <table:table-cell office:value-type="string" calcext:value-type="string">
            <text:p>Critical</text:p>
          </table:table-cell>
          <table:table-cell table:style-name="ce4"/>
          <table:table-cell office:value-type="string" calcext:value-type="string">
            <text:p>json-schema is vulnerable to Improperly Controlled Modification of Object Prototype Attributes ('Prototype Pollution')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8">
          <table:table-cell office:value-type="string" calcext:value-type="string">
            <text:p>js-yaml (https://registry.npmjs.org/js-yaml/-/js-yaml-3.6.1.tgz)</text:p>
          </table:table-cell>
          <table:table-cell office:value-type="string" calcext:value-type="string">
            <text:p><text:a xlink:href="https://github.com/advisories/GHSA-2pr6-76vf-7546" xlink:type="simple">GHSA-2pr6-76vf-7546</text:a></text:p>
          </table:table-cell>
          <table:table-cell office:value-type="string" calcext:value-type="string">
            <text:p>Medium</text:p>
          </table:table-cell>
          <table:table-cell office:value-type="string" calcext:value-type="string">
            <text:p>3.13.0</text:p>
          </table:table-cell>
          <table:table-cell office:value-type="string" calcext:value-type="string">
            <text:p>Denial of Service in js-yaml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8">
          <table:table-cell office:value-type="string" calcext:value-type="string">
            <text:p>js-yaml (https://registry.npmjs.org/js-yaml/-/js-yaml-3.6.1.tgz)</text:p>
          </table:table-cell>
          <table:table-cell office:value-type="string" calcext:value-type="string">
            <text:p><text:a xlink:href="https://github.com/advisories/GHSA-8j8c-7jfh-h6hx" xlink:type="simple">GHSA-8j8c-7jfh-h6hx</text:a></text:p>
          </table:table-cell>
          <table:table-cell office:value-type="string" calcext:value-type="string">
            <text:p>High</text:p>
          </table:table-cell>
          <table:table-cell office:value-type="string" calcext:value-type="string">
            <text:p>3.13.1</text:p>
          </table:table-cell>
          <table:table-cell office:value-type="string" calcext:value-type="string">
            <text:p>Code Injection in js-yaml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8">
          <table:table-cell office:value-type="string" calcext:value-type="string">
            <text:p>js-yaml (https://registry.npmjs.org/js-yaml/-/js-yaml-3.6.1.tgz)</text:p>
          </table:table-cell>
          <table:table-cell office:value-type="string" calcext:value-type="string">
            <text:p><text:a xlink:href="https://github.com/advisories/GHSA-xxvw-45rp-3mj2" xlink:type="simple">GHSA-xxvw-45rp-3mj2</text:a></text:p>
          </table:table-cell>
          <table:table-cell office:value-type="string" calcext:value-type="string">
            <text:p>Critical</text:p>
          </table:table-cell>
          <table:table-cell office:value-type="string" calcext:value-type="string">
            <text:p>2.0.5</text:p>
          </table:table-cell>
          <table:table-cell office:value-type="string" calcext:value-type="string">
            <text:p>Deserialization Code Execution in js-yaml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7">
          <table:table-cell office:value-type="string" calcext:value-type="string">
            <text:p>js-yaml (https://registry.npmjs.org/js-yaml/-/js-yaml-3.6.1.tgz)</text:p>
          </table:table-cell>
          <table:table-cell office:value-type="string" calcext:value-type="string">
            <text:p><text:a xlink:href="https://cve.mitre.org/cgi-bin/cvename.cgi?name=CVE-2013-4660" xlink:type="simple">CVE-2013-4660</text:a></text:p>
          </table:table-cell>
          <table:table-cell office:value-type="string" calcext:value-type="string">
            <text:p>Medium</text:p>
          </table:table-cell>
          <table:table-cell table:style-name="ce4"/>
          <table:table-cell office:value-type="string" calcext:value-type="string">
            <text:p>The JS-YAML module before 2.0.5 for Node.js parses input without properly considering the unsafe !!js/function tag, which allows remote attackers to execute arbitrary code via a crafted string that triggers an eval operation.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6">
          <table:table-cell office:value-type="string" calcext:value-type="string">
            <text:p>is-my-json-valid (2.16.1)</text:p>
          </table:table-cell>
          <table:table-cell office:value-type="string" calcext:value-type="string">
            <text:p><text:a xlink:href="https://github.com/advisories/GHSA-4hpf-3wq7-5rpr" xlink:type="simple">GHSA-4hpf-3wq7-5rpr</text:a></text:p>
          </table:table-cell>
          <table:table-cell office:value-type="string" calcext:value-type="string">
            <text:p>Medium</text:p>
          </table:table-cell>
          <table:table-cell office:value-type="string" calcext:value-type="string">
            <text:p>2.17.2</text:p>
          </table:table-cell>
          <table:table-cell office:value-type="string" calcext:value-type="string">
            <text:p>Regular expression deinal of service (ReDoS) in is-my-json-valid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3">
          <table:table-cell office:value-type="string" calcext:value-type="string">
            <text:p>is-my-json-valid (2.16.1)</text:p>
          </table:table-cell>
          <table:table-cell office:value-type="string" calcext:value-type="string">
            <text:p><text:a xlink:href="https://github.com/advisories/GHSA-f522-ffg8-j8r6" xlink:type="simple">GHSA-f522-ffg8-j8r6</text:a></text:p>
          </table:table-cell>
          <table:table-cell office:value-type="string" calcext:value-type="string">
            <text:p>High</text:p>
          </table:table-cell>
          <table:table-cell office:value-type="string" calcext:value-type="string">
            <text:p>2.17.2</text:p>
          </table:table-cell>
          <table:table-cell office:value-type="string" calcext:value-type="string">
            <text:p>Regular Expression Denial of Service in is-my-json-valid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25">
          <table:table-cell office:value-type="string" calcext:value-type="string">
            <text:p>is-my-json-valid (2.16.1)</text:p>
          </table:table-cell>
          <table:table-cell office:value-type="string" calcext:value-type="string">
            <text:p><text:a xlink:href="https://cve.mitre.org/cgi-bin/cvename.cgi?name=CVE-2018-1107" xlink:type="simple">CVE-2018-1107</text:a></text:p>
          </table:table-cell>
          <table:table-cell office:value-type="string" calcext:value-type="string">
            <text:p>Medium</text:p>
          </table:table-cell>
          <table:table-cell table:style-name="ce4"/>
          <table:table-cell office:value-type="string" calcext:value-type="string">
            <text:p>It was discovered that the is-my-json-valid JavaScript library used an inefficient regular expression to validate JSON fields defined to have email format. A specially crafted JSON file could cause it to consume an excessive amount of CPU time when validated.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7">
          <table:table-cell office:value-type="string" calcext:value-type="string">
            <text:p>hoek (2.16.3)</text:p>
          </table:table-cell>
          <table:table-cell office:value-type="string" calcext:value-type="string">
            <text:p><text:a xlink:href="https://github.com/advisories/GHSA-c429-5p7v-vgjp" xlink:type="simple">GHSA-c429-5p7v-vgjp</text:a></text:p>
          </table:table-cell>
          <table:table-cell office:value-type="string" calcext:value-type="string">
            <text:p>High</text:p>
          </table:table-cell>
          <table:table-cell table:style-name="ce4"/>
          <table:table-cell office:value-type="string" calcext:value-type="string">
            <text:p>hoek subject to prototype pollution via the clone function.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1">
          <table:table-cell office:value-type="string" calcext:value-type="string">
            <text:p>hoek (2.16.3)</text:p>
          </table:table-cell>
          <table:table-cell office:value-type="string" calcext:value-type="string">
            <text:p><text:a xlink:href="https://github.com/advisories/GHSA-jp4x-w63m-7wgm" xlink:type="simple">GHSA-jp4x-w63m-7wgm</text:a></text:p>
          </table:table-cell>
          <table:table-cell office:value-type="string" calcext:value-type="string">
            <text:p>High</text:p>
          </table:table-cell>
          <table:table-cell office:value-type="string" calcext:value-type="string">
            <text:p>4.2.1</text:p>
          </table:table-cell>
          <table:table-cell office:value-type="string" calcext:value-type="string">
            <text:p>Prototype Pollution in hoek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20">
          <table:table-cell office:value-type="string" calcext:value-type="string">
            <text:p>hoek (2.16.3)</text:p>
          </table:table-cell>
          <table:table-cell office:value-type="string" calcext:value-type="string">
            <text:p><text:a xlink:href="https://cve.mitre.org/cgi-bin/cvename.cgi?name=CVE-2018-3728" xlink:type="simple">CVE-2018-3728</text:a></text:p>
          </table:table-cell>
          <table:table-cell office:value-type="string" calcext:value-type="string">
            <text:p>High</text:p>
          </table:table-cell>
          <table:table-cell table:style-name="ce4"/>
          <table:table-cell office:value-type="string" calcext:value-type="string">
            <text:p>hoek node module before 4.2.0 and 5.0.x before 5.0.3 suffers from a Modification of Assumed-Immutable Data (MAID) vulnerability via 'merge' and 'applyToDefaults' functions, which allows a malicious user to modify the prototype of "Object" via __proto__, causing the addition or modification of an existing property that will exist on all object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22">
          <table:table-cell office:value-type="string" calcext:value-type="string">
            <text:p>hoek (2.16.3)</text:p>
          </table:table-cell>
          <table:table-cell office:value-type="string" calcext:value-type="string">
            <text:p><text:a xlink:href="https://cve.mitre.org/cgi-bin/cvename.cgi?name=CVE-2020-36604" xlink:type="simple">CVE-2020-36604</text:a></text:p>
          </table:table-cell>
          <table:table-cell office:value-type="string" calcext:value-type="string">
            <text:p>High</text:p>
          </table:table-cell>
          <table:table-cell table:style-name="ce4"/>
          <table:table-cell office:value-type="string" calcext:value-type="string">
            <text:p>hoek before 8.5.1 and 9.x before 9.0.3 allows prototype poisoning in the clone function.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8">
          <table:table-cell office:value-type="string" calcext:value-type="string">
            <text:p>hawk (3.1.3)</text:p>
          </table:table-cell>
          <table:table-cell office:value-type="string" calcext:value-type="string">
            <text:p><text:a xlink:href="https://github.com/advisories/GHSA-44pw-h2cw-w3vq" xlink:type="simple">GHSA-44pw-h2cw-w3vq</text:a></text:p>
          </table:table-cell>
          <table:table-cell office:value-type="string" calcext:value-type="string">
            <text:p>High</text:p>
          </table:table-cell>
          <table:table-cell office:value-type="string" calcext:value-type="string">
            <text:p>9.0.1</text:p>
          </table:table-cell>
          <table:table-cell office:value-type="string" calcext:value-type="string">
            <text:p>Uncontrolled Resource Consumption in Hawk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4">
          <table:table-cell office:value-type="string" calcext:value-type="string">
            <text:p>hawk (3.1.3)</text:p>
          </table:table-cell>
          <table:table-cell office:value-type="string" calcext:value-type="string">
            <text:p><text:a xlink:href="https://cve.mitre.org/cgi-bin/cvename.cgi?name=CVE-2008-1703" xlink:type="simple">CVE-2008-1703</text:a></text:p>
          </table:table-cell>
          <table:table-cell office:value-type="string" calcext:value-type="string">
            <text:p>High</text:p>
          </table:table-cell>
          <table:table-cell table:style-name="ce4"/>
          <table:table-cell office:value-type="string" calcext:value-type="string">
            <text:p>Multiple buffer overflows in TIBCO Software Rendezvous before 8.1.0, as used in multiple TIBCO products, allow remote attackers to execute arbitrary code via a crafted message.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26">
          <table:table-cell office:value-type="string" calcext:value-type="string">
            <text:p>hawk (3.1.3)</text:p>
          </table:table-cell>
          <table:table-cell office:value-type="string" calcext:value-type="string">
            <text:p><text:a xlink:href="https://cve.mitre.org/cgi-bin/cvename.cgi?name=CVE-2008-3338" xlink:type="simple">CVE-2008-3338</text:a></text:p>
          </table:table-cell>
          <table:table-cell office:value-type="string" calcext:value-type="string">
            <text:p>High</text:p>
          </table:table-cell>
          <table:table-cell table:style-name="ce4"/>
          <table:table-cell office:value-type="string" calcext:value-type="string">
            <text:p>Multiple buffer overflows in TIBCO Hawk (1) AMI C library (libtibhawkami) and (2) Hawk HMA (tibhawkhma), as used in TIBCO Hawk before 4.8.1; Runtime Agent (TRA) before 5.6.0; iProcess Engine 10.3.0 through 10.6.2 and 11.0.0; and Mainframe Service Tracker before 1.1.0 might allow remote attackers to execute arbitrary code via a crafted message.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27">
          <table:table-cell office:value-type="string" calcext:value-type="string">
            <text:p>hawk (3.1.3)</text:p>
          </table:table-cell>
          <table:table-cell office:value-type="string" calcext:value-type="string">
            <text:p><text:a xlink:href="https://cve.mitre.org/cgi-bin/cvename.cgi?name=CVE-2022-29167" xlink:type="simple">CVE-2022-29167</text:a></text:p>
          </table:table-cell>
          <table:table-cell office:value-type="string" calcext:value-type="string">
            <text:p>High</text:p>
          </table:table-cell>
          <table:table-cell table:style-name="ce4"/>
          <table:table-cell office:value-type="string" calcext:value-type="string">
            <text:p>Hawk is an HTTP authentication scheme providing mechanisms for making authenticated HTTP requests with partial cryptographic verification of the request and response, covering the HTTP method, request URI, host, and optionally the request payload. Hawk used a regular expression to parse `Host` HTTP header (`Hawk.utils.parseHost()`), which was subject to regular expression DoS attack - meaning each added character in the attacker's input increases the computation time exponentially. `parseHost()` was patched in `9.0.1` to use built-in `URL` class to parse hostname instead. `Hawk.authenticate()` accepts `options` argument. If that contains `host` and `port`, those would be used instead of a call to `utils.parseHost()`.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28">
          <table:table-cell office:value-type="string" calcext:value-type="string">
            <text:p>hawk (3.1.3)</text:p>
          </table:table-cell>
          <table:table-cell office:value-type="string" calcext:value-type="string">
            <text:p><text:a xlink:href="https://cve.mitre.org/cgi-bin/cvename.cgi?name=CVE-2023-26219" xlink:type="simple">CVE-2023-26219</text:a></text:p>
          </table:table-cell>
          <table:table-cell office:value-type="string" calcext:value-type="string">
            <text:p>High</text:p>
          </table:table-cell>
          <table:table-cell table:style-name="ce4"/>
          <table:table-cell office:value-type="string" calcext:value-type="string">
            <text:p>The Hawk Console and Hawk Agent components of TIBCO Software Inc.'s TIBCO Hawk, TIBCO Hawk Distribution for TIBCO Silver Fabric, TIBCO Operational Intelligence Hawk RedTail, and TIBCO Runtime Agent contain a vulnerability that theoretically allows an attacker with access to the Hawk Console’s and Agent’s log to obtain credentials used to access associated EMS servers. Affected releases are TIBCO Software Inc.'s TIBCO Hawk: versions 6.2.2 and below, TIBCO Hawk Distribution for TIBCO Silver Fabric: versions 6.2.2 and below, TIBCO Operational Intelligence Hawk RedTail: versions 7.2.1 and below, and TIBCO Runtime Agent: versions 5.12.2 and below.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7">
          <table:table-cell office:value-type="string" calcext:value-type="string">
            <text:p>handlebars (https://registry.npmjs.org/handlebars/-/handlebars-4.0.10.tgz)</text:p>
          </table:table-cell>
          <table:table-cell office:value-type="string" calcext:value-type="string">
            <text:p><text:a xlink:href="https://github.com/advisories/GHSA-2cf5-4w76-r9qv" xlink:type="simple">GHSA-2cf5-4w76-r9qv</text:a></text:p>
          </table:table-cell>
          <table:table-cell office:value-type="string" calcext:value-type="string">
            <text:p>High</text:p>
          </table:table-cell>
          <table:table-cell office:value-type="string" calcext:value-type="string">
            <text:p>3.0.8</text:p>
          </table:table-cell>
          <table:table-cell office:value-type="string" calcext:value-type="string">
            <text:p>Arbitrary Code Execution in handlebar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7">
          <table:table-cell office:value-type="string" calcext:value-type="string">
            <text:p>handlebars (https://registry.npmjs.org/handlebars/-/handlebars-4.0.10.tgz)</text:p>
          </table:table-cell>
          <table:table-cell office:value-type="string" calcext:value-type="string">
            <text:p><text:a xlink:href="https://github.com/advisories/GHSA-3cqr-58rm-57f8" xlink:type="simple">GHSA-3cqr-58rm-57f8</text:a></text:p>
          </table:table-cell>
          <table:table-cell office:value-type="string" calcext:value-type="string">
            <text:p>High</text:p>
          </table:table-cell>
          <table:table-cell office:value-type="string" calcext:value-type="string">
            <text:p>3.0.8</text:p>
          </table:table-cell>
          <table:table-cell office:value-type="string" calcext:value-type="string">
            <text:p>Arbitrary Code Execution in Handlebar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7">
          <table:table-cell office:value-type="string" calcext:value-type="string">
            <text:p>handlebars (https://registry.npmjs.org/handlebars/-/handlebars-4.0.10.tgz)</text:p>
          </table:table-cell>
          <table:table-cell office:value-type="string" calcext:value-type="string">
            <text:p><text:a xlink:href="https://github.com/advisories/GHSA-765h-qjxv-5f44" xlink:type="simple">GHSA-765h-qjxv-5f44</text:a></text:p>
          </table:table-cell>
          <table:table-cell office:value-type="string" calcext:value-type="string">
            <text:p>Critical</text:p>
          </table:table-cell>
          <table:table-cell office:value-type="string" calcext:value-type="string">
            <text:p>4.7.7</text:p>
          </table:table-cell>
          <table:table-cell office:value-type="string" calcext:value-type="string">
            <text:p>Prototype Pollution in handlebar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7">
          <table:table-cell office:value-type="string" calcext:value-type="string">
            <text:p>handlebars (https://registry.npmjs.org/handlebars/-/handlebars-4.0.10.tgz)</text:p>
          </table:table-cell>
          <table:table-cell office:value-type="string" calcext:value-type="string">
            <text:p><text:a xlink:href="https://github.com/advisories/GHSA-9prh-257w-9277" xlink:type="simple">GHSA-9prh-257w-9277</text:a></text:p>
          </table:table-cell>
          <table:table-cell office:value-type="string" calcext:value-type="string">
            <text:p>Medium</text:p>
          </table:table-cell>
          <table:table-cell office:value-type="string" calcext:value-type="string">
            <text:p>4.0.0</text:p>
          </table:table-cell>
          <table:table-cell office:value-type="string" calcext:value-type="string">
            <text:p>Cross-Site Scripting in handlebar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3">
          <table:table-cell office:value-type="string" calcext:value-type="string">
            <text:p>handlebars (https://registry.npmjs.org/handlebars/-/handlebars-4.0.10.tgz)</text:p>
          </table:table-cell>
          <table:table-cell office:value-type="string" calcext:value-type="string">
            <text:p><text:a xlink:href="https://github.com/advisories/GHSA-f2jv-r9rf-7988" xlink:type="simple">GHSA-f2jv-r9rf-7988</text:a></text:p>
          </table:table-cell>
          <table:table-cell office:value-type="string" calcext:value-type="string">
            <text:p>Critical</text:p>
          </table:table-cell>
          <table:table-cell office:value-type="string" calcext:value-type="string">
            <text:p>4.7.7</text:p>
          </table:table-cell>
          <table:table-cell office:value-type="string" calcext:value-type="string">
            <text:p>Remote code execution in handlebars when compiling template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7">
          <table:table-cell office:value-type="string" calcext:value-type="string">
            <text:p>handlebars (https://registry.npmjs.org/handlebars/-/handlebars-4.0.10.tgz)</text:p>
          </table:table-cell>
          <table:table-cell office:value-type="string" calcext:value-type="string">
            <text:p><text:a xlink:href="https://github.com/advisories/GHSA-g9r4-xpmj-mj65" xlink:type="simple">GHSA-g9r4-xpmj-mj65</text:a></text:p>
          </table:table-cell>
          <table:table-cell office:value-type="string" calcext:value-type="string">
            <text:p>High</text:p>
          </table:table-cell>
          <table:table-cell office:value-type="string" calcext:value-type="string">
            <text:p>3.0.8</text:p>
          </table:table-cell>
          <table:table-cell office:value-type="string" calcext:value-type="string">
            <text:p>Prototype Pollution in handlebar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7">
          <table:table-cell office:value-type="string" calcext:value-type="string">
            <text:p>handlebars (https://registry.npmjs.org/handlebars/-/handlebars-4.0.10.tgz)</text:p>
          </table:table-cell>
          <table:table-cell office:value-type="string" calcext:value-type="string">
            <text:p><text:a xlink:href="https://github.com/advisories/GHSA-q2c6-c6pm-g3gh" xlink:type="simple">GHSA-q2c6-c6pm-g3gh</text:a></text:p>
          </table:table-cell>
          <table:table-cell office:value-type="string" calcext:value-type="string">
            <text:p>High</text:p>
          </table:table-cell>
          <table:table-cell office:value-type="string" calcext:value-type="string">
            <text:p>3.0.8</text:p>
          </table:table-cell>
          <table:table-cell office:value-type="string" calcext:value-type="string">
            <text:p>Arbitrary Code Execution in handlebar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7">
          <table:table-cell office:value-type="string" calcext:value-type="string">
            <text:p>handlebars (https://registry.npmjs.org/handlebars/-/handlebars-4.0.10.tgz)</text:p>
          </table:table-cell>
          <table:table-cell office:value-type="string" calcext:value-type="string">
            <text:p><text:a xlink:href="https://github.com/advisories/GHSA-q42p-pg8m-cqh6" xlink:type="simple">GHSA-q42p-pg8m-cqh6</text:a></text:p>
          </table:table-cell>
          <table:table-cell office:value-type="string" calcext:value-type="string">
            <text:p>High</text:p>
          </table:table-cell>
          <table:table-cell office:value-type="string" calcext:value-type="string">
            <text:p>3.0.7</text:p>
          </table:table-cell>
          <table:table-cell office:value-type="string" calcext:value-type="string">
            <text:p>Prototype Pollution in handlebar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7">
          <table:table-cell office:value-type="string" calcext:value-type="string">
            <text:p>handlebars (https://registry.npmjs.org/handlebars/-/handlebars-4.0.10.tgz)</text:p>
          </table:table-cell>
          <table:table-cell office:value-type="string" calcext:value-type="string">
            <text:p><text:a xlink:href="https://github.com/advisories/GHSA-w457-6q6x-cgp9" xlink:type="simple">GHSA-w457-6q6x-cgp9</text:a></text:p>
          </table:table-cell>
          <table:table-cell office:value-type="string" calcext:value-type="string">
            <text:p>Critical</text:p>
          </table:table-cell>
          <table:table-cell office:value-type="string" calcext:value-type="string">
            <text:p>3.0.8</text:p>
          </table:table-cell>
          <table:table-cell office:value-type="string" calcext:value-type="string">
            <text:p>Prototype Pollution in handlebar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29">
          <table:table-cell office:value-type="string" calcext:value-type="string">
            <text:p>handlebars (https://registry.npmjs.org/handlebars/-/handlebars-4.0.10.tgz)</text:p>
          </table:table-cell>
          <table:table-cell office:value-type="string" calcext:value-type="string">
            <text:p><text:a xlink:href="https://cve.mitre.org/cgi-bin/cvename.cgi?name=CVE-2019-20920" xlink:type="simple">CVE-2019-20920</text:a></text:p>
          </table:table-cell>
          <table:table-cell office:value-type="string" calcext:value-type="string">
            <text:p>High</text:p>
          </table:table-cell>
          <table:table-cell table:style-name="ce4"/>
          <table:table-cell office:value-type="string" calcext:value-type="string">
            <text:p>Handlebars before 3.0.8 and 4.x before 4.5.3 is vulnerable to Arbitrary Code Execution. The lookup helper fails to properly validate templates, allowing attackers to submit templates that execute arbitrary JavaScript. This can be used to run arbitrary code on a server processing Handlebars templates or in a victim's browser (effectively serving as XS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8">
          <table:table-cell office:value-type="string" calcext:value-type="string">
            <text:p>handlebars (https://registry.npmjs.org/handlebars/-/handlebars-4.0.10.tgz)</text:p>
          </table:table-cell>
          <table:table-cell office:value-type="string" calcext:value-type="string">
            <text:p><text:a xlink:href="https://cve.mitre.org/cgi-bin/cvename.cgi?name=CVE-2021-23369" xlink:type="simple">CVE-2021-23369</text:a></text:p>
          </table:table-cell>
          <table:table-cell office:value-type="string" calcext:value-type="string">
            <text:p>Critical</text:p>
          </table:table-cell>
          <table:table-cell table:style-name="ce4"/>
          <table:table-cell office:value-type="string" calcext:value-type="string">
            <text:p>The package handlebars before 4.7.7 are vulnerable to Remote Code Execution (RCE) when selecting certain compiling options to compile templates coming from an untrusted source.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30">
          <table:table-cell office:value-type="string" calcext:value-type="string">
            <text:p>handlebars (https://registry.npmjs.org/handlebars/-/handlebars-4.0.10.tgz)</text:p>
          </table:table-cell>
          <table:table-cell office:value-type="string" calcext:value-type="string">
            <text:p><text:a xlink:href="https://cve.mitre.org/cgi-bin/cvename.cgi?name=CVE-2021-23383" xlink:type="simple">CVE-2021-23383</text:a></text:p>
          </table:table-cell>
          <table:table-cell office:value-type="string" calcext:value-type="string">
            <text:p>Critical</text:p>
          </table:table-cell>
          <table:table-cell table:style-name="ce4"/>
          <table:table-cell office:value-type="string" calcext:value-type="string">
            <text:p>The package handlebars before 4.7.7 are vulnerable to Prototype Pollution when selecting certain compiling options to compile templates coming from an untrusted source.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7">
          <table:table-cell office:value-type="string" calcext:value-type="string">
            <text:p>growl (1.9.2)</text:p>
          </table:table-cell>
          <table:table-cell office:value-type="string" calcext:value-type="string">
            <text:p><text:a xlink:href="https://github.com/advisories/GHSA-qh2h-chj9-jffq" xlink:type="simple">GHSA-qh2h-chj9-jffq</text:a></text:p>
          </table:table-cell>
          <table:table-cell office:value-type="string" calcext:value-type="string">
            <text:p>Critical</text:p>
          </table:table-cell>
          <table:table-cell office:value-type="string" calcext:value-type="string">
            <text:p>1.10.0</text:p>
          </table:table-cell>
          <table:table-cell office:value-type="string" calcext:value-type="string">
            <text:p>Growl before 1.10.0 vulnerable to Command Injection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30">
          <table:table-cell office:value-type="string" calcext:value-type="string">
            <text:p>growl (1.9.2)</text:p>
          </table:table-cell>
          <table:table-cell office:value-type="string" calcext:value-type="string">
            <text:p><text:a xlink:href="https://cve.mitre.org/cgi-bin/cvename.cgi?name=CVE-2017-16042" xlink:type="simple">CVE-2017-16042</text:a></text:p>
          </table:table-cell>
          <table:table-cell office:value-type="string" calcext:value-type="string">
            <text:p>Critical</text:p>
          </table:table-cell>
          <table:table-cell table:style-name="ce4"/>
          <table:table-cell office:value-type="string" calcext:value-type="string">
            <text:p>Growl adds growl notification support to nodejs. Growl before 1.10.2 does not properly sanitize input before passing it to exec, allowing for arbitrary command execution.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31">
          <table:table-cell office:value-type="string" calcext:value-type="string">
            <text:p>glob-parent (2.0.0)</text:p>
          </table:table-cell>
          <table:table-cell office:value-type="string" calcext:value-type="string">
            <text:p><text:a xlink:href="https://cve.mitre.org/cgi-bin/cvename.cgi?name=CVE-2020-28469" xlink:type="simple">CVE-2020-28469</text:a></text:p>
          </table:table-cell>
          <table:table-cell office:value-type="string" calcext:value-type="string">
            <text:p>High</text:p>
          </table:table-cell>
          <table:table-cell table:style-name="ce4"/>
          <table:table-cell office:value-type="string" calcext:value-type="string">
            <text:p>This affects the package glob-parent before 5.1.2. The enclosure regex used to check for strings ending in enclosure containing path separator.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1">
          <table:table-cell office:value-type="string" calcext:value-type="string">
            <text:p>fsevents (1.1.2)</text:p>
          </table:table-cell>
          <table:table-cell office:value-type="string" calcext:value-type="string">
            <text:p><text:a xlink:href="https://github.com/advisories/GHSA-8r6j-v8pm-fqw3" xlink:type="simple">GHSA-8r6j-v8pm-fqw3</text:a></text:p>
          </table:table-cell>
          <table:table-cell office:value-type="string" calcext:value-type="string">
            <text:p>Critical</text:p>
          </table:table-cell>
          <table:table-cell office:value-type="string" calcext:value-type="string">
            <text:p>1.2.11</text:p>
          </table:table-cell>
          <table:table-cell office:value-type="string" calcext:value-type="string">
            <text:p>Code injection in fsevent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32">
          <table:table-cell office:value-type="string" calcext:value-type="string">
            <text:p>fsevents (1.1.2)</text:p>
          </table:table-cell>
          <table:table-cell office:value-type="string" calcext:value-type="string">
            <text:p><text:a xlink:href="https://github.com/advisories/GHSA-xv2f-5jw4-v95m" xlink:type="simple">GHSA-xv2f-5jw4-v95m</text:a></text:p>
          </table:table-cell>
          <table:table-cell office:value-type="string" calcext:value-type="string">
            <text:p>Critical</text:p>
          </table:table-cell>
          <table:table-cell office:value-type="string" calcext:value-type="string">
            <text:p>1.2.11</text:p>
          </table:table-cell>
          <table:table-cell office:value-type="string" calcext:value-type="string">
            <text:p>Malware in fsevent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33">
          <table:table-cell office:value-type="string" calcext:value-type="string">
            <text:p>fsevents (1.1.2)</text:p>
          </table:table-cell>
          <table:table-cell office:value-type="string" calcext:value-type="string">
            <text:p><text:a xlink:href="https://cve.mitre.org/cgi-bin/cvename.cgi?name=CVE-2023-45311" xlink:type="simple">CVE-2023-45311</text:a></text:p>
          </table:table-cell>
          <table:table-cell office:value-type="string" calcext:value-type="string">
            <text:p>Critical</text:p>
          </table:table-cell>
          <table:table-cell table:style-name="ce4"/>
          <table:table-cell office:value-type="string" calcext:value-type="string">
            <text:p>fsevents before 1.2.11 depends on the https://fsevents-binaries.s3-us-west-2.amazonaws.com URL, which might allow an adversary to execute arbitrary code if any JavaScript project (that depends on fsevents) distributes code that was obtained from that URL at a time when it was controlled by an adversary. NOTE: some sources feel that this means that no version is affected any longer, because the URL is not controlled by an adversary.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11">
          <table:table-cell office:value-type="string" calcext:value-type="string">
            <text:p>extend (3.0.1)</text:p>
          </table:table-cell>
          <table:table-cell office:value-type="string" calcext:value-type="string">
            <text:p><text:a xlink:href="https://github.com/advisories/GHSA-qrmc-fj45-qfc2" xlink:type="simple">GHSA-qrmc-fj45-qfc2</text:a></text:p>
          </table:table-cell>
          <table:table-cell office:value-type="string" calcext:value-type="string">
            <text:p>Medium</text:p>
          </table:table-cell>
          <table:table-cell office:value-type="string" calcext:value-type="string">
            <text:p>3.0.2</text:p>
          </table:table-cell>
          <table:table-cell office:value-type="string" calcext:value-type="string">
            <text:p>Prototype Pollution in extend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31">
          <table:table-cell office:value-type="string" calcext:value-type="string">
            <text:p>extend (3.0.1)</text:p>
          </table:table-cell>
          <table:table-cell office:value-type="string" calcext:value-type="string">
            <text:p><text:a xlink:href="https://cve.mitre.org/cgi-bin/cvename.cgi?name=CVE-2018-16492" xlink:type="simple">CVE-2018-16492</text:a></text:p>
          </table:table-cell>
          <table:table-cell office:value-type="string" calcext:value-type="string">
            <text:p>Critical</text:p>
          </table:table-cell>
          <table:table-cell table:style-name="ce4"/>
          <table:table-cell office:value-type="string" calcext:value-type="string">
            <text:p>A prototype pollution vulnerability was found in module extend &lt;2.0.2, ~&lt;3.0.2 that allows an attacker to inject arbitrary properties onto Object.prototype.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9">
          <table:table-cell office:value-type="string" calcext:value-type="string">
            <text:p>doctrine (2.0.0)</text:p>
          </table:table-cell>
          <table:table-cell office:value-type="string" calcext:value-type="string">
            <text:p><text:a xlink:href="https://cve.mitre.org/cgi-bin/cvename.cgi?name=CVE-2011-1522" xlink:type="simple">CVE-2011-1522</text:a></text:p>
          </table:table-cell>
          <table:table-cell office:value-type="string" calcext:value-type="string">
            <text:p>High</text:p>
          </table:table-cell>
          <table:table-cell table:style-name="ce4"/>
          <table:table-cell office:value-type="string" calcext:value-type="string">
            <text:p>Multiple SQL injection vulnerabilities in the Doctrine\DBAL\Platforms\AbstractPlatform::modifyLimitQuery function in Doctrine 1.x before 1.2.4 and 2.x before 2.0.3 allow remote attackers to execute arbitrary SQL commands via the (1) limit or (2) offset field.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7">
          <table:table-cell office:value-type="string" calcext:value-type="string">
            <text:p>diff (3.2.0)</text:p>
          </table:table-cell>
          <table:table-cell office:value-type="string" calcext:value-type="string">
            <text:p><text:a xlink:href="https://github.com/advisories/GHSA-h6ch-v84p-w6p9" xlink:type="simple">GHSA-h6ch-v84p-w6p9</text:a></text:p>
          </table:table-cell>
          <table:table-cell office:value-type="string" calcext:value-type="string">
            <text:p>High</text:p>
          </table:table-cell>
          <table:table-cell office:value-type="string" calcext:value-type="string">
            <text:p>3.5.0</text:p>
          </table:table-cell>
          <table:table-cell office:value-type="string" calcext:value-type="string">
            <text:p>Regular Expression Denial of Service (ReDo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34">
          <table:table-cell office:value-type="string" calcext:value-type="string">
            <text:p>cryptiles (2.0.5)</text:p>
          </table:table-cell>
          <table:table-cell office:value-type="string" calcext:value-type="string">
            <text:p><text:a xlink:href="https://cve.mitre.org/cgi-bin/cvename.cgi?name=CVE-2018-1000620" xlink:type="simple">CVE-2018-1000620</text:a></text:p>
          </table:table-cell>
          <table:table-cell office:value-type="string" calcext:value-type="string">
            <text:p>Critical</text:p>
          </table:table-cell>
          <table:table-cell table:style-name="ce4"/>
          <table:table-cell office:value-type="string" calcext:value-type="string">
            <text:p>Eran Hammer cryptiles version 4.1.1 earlier contains a CWE-331: Insufficient Entropy vulnerability in randomDigits() method that can result in An attacker is more likely to be able to brute force something that was supposed to be random.. This attack appear to be exploitable via Depends upon the calling application.. This vulnerability appears to have been fixed in 4.1.2.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6">
          <table:table-cell office:value-type="string" calcext:value-type="string">
            <text:p>cross-spawn (7.0.3)</text:p>
          </table:table-cell>
          <table:table-cell office:value-type="string" calcext:value-type="string">
            <text:p><text:a xlink:href="https://github.com/advisories/GHSA-3xgq-45jj-v275" xlink:type="simple">GHSA-3xgq-45jj-v275</text:a></text:p>
          </table:table-cell>
          <table:table-cell office:value-type="string" calcext:value-type="string">
            <text:p>High</text:p>
          </table:table-cell>
          <table:table-cell office:value-type="string" calcext:value-type="string">
            <text:p>7.0.5</text:p>
          </table:table-cell>
          <table:table-cell office:value-type="string" calcext:value-type="string">
            <text:p>Regular Expression Denial of Service (ReDoS) in cross-spawn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node-sarif-builder/yarn.lock</text:a></text:p>
          </table:table-cell>
        </table:table-row>
        <table:table-row table:style-name="ro6">
          <table:table-cell office:value-type="string" calcext:value-type="string">
            <text:p>cross-spawn (5.1.0)</text:p>
          </table:table-cell>
          <table:table-cell office:value-type="string" calcext:value-type="string">
            <text:p><text:a xlink:href="https://github.com/advisories/GHSA-3xgq-45jj-v275" xlink:type="simple">GHSA-3xgq-45jj-v275</text:a></text:p>
          </table:table-cell>
          <table:table-cell office:value-type="string" calcext:value-type="string">
            <text:p>High</text:p>
          </table:table-cell>
          <table:table-cell office:value-type="string" calcext:value-type="string">
            <text:p>6.0.6</text:p>
          </table:table-cell>
          <table:table-cell office:value-type="string" calcext:value-type="string">
            <text:p>Regular Expression Denial of Service (ReDoS) in cross-spawn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8">
          <table:table-cell office:value-type="string" calcext:value-type="string">
            <text:p>braces (3.0.2)</text:p>
          </table:table-cell>
          <table:table-cell office:value-type="string" calcext:value-type="string">
            <text:p><text:a xlink:href="https://github.com/advisories/GHSA-grv7-fg5c-xmjg" xlink:type="simple">GHSA-grv7-fg5c-xmjg</text:a></text:p>
          </table:table-cell>
          <table:table-cell office:value-type="string" calcext:value-type="string">
            <text:p>High</text:p>
          </table:table-cell>
          <table:table-cell office:value-type="string" calcext:value-type="string">
            <text:p>3.0.3</text:p>
          </table:table-cell>
          <table:table-cell office:value-type="string" calcext:value-type="string">
            <text:p>Uncontrolled resource consumption in brace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node-sarif-builder/yarn.lock</text:a></text:p>
          </table:table-cell>
        </table:table-row>
        <table:table-row table:style-name="ro3">
          <table:table-cell office:value-type="string" calcext:value-type="string">
            <text:p>braces (1.8.5)</text:p>
          </table:table-cell>
          <table:table-cell office:value-type="string" calcext:value-type="string">
            <text:p><text:a xlink:href="https://github.com/advisories/GHSA-cwfw-4gq5-mrqx" xlink:type="simple">GHSA-cwfw-4gq5-mrqx</text:a></text:p>
          </table:table-cell>
          <table:table-cell office:value-type="string" calcext:value-type="string">
            <text:p>Low</text:p>
          </table:table-cell>
          <table:table-cell office:value-type="string" calcext:value-type="string">
            <text:p>2.3.1</text:p>
          </table:table-cell>
          <table:table-cell office:value-type="string" calcext:value-type="string">
            <text:p>Regular Expression Denial of Service (ReDoS) in brace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7">
          <table:table-cell office:value-type="string" calcext:value-type="string">
            <text:p>braces (1.8.5)</text:p>
          </table:table-cell>
          <table:table-cell office:value-type="string" calcext:value-type="string">
            <text:p><text:a xlink:href="https://github.com/advisories/GHSA-g95f-p29q-9xw4" xlink:type="simple">GHSA-g95f-p29q-9xw4</text:a></text:p>
          </table:table-cell>
          <table:table-cell office:value-type="string" calcext:value-type="string">
            <text:p>Low</text:p>
          </table:table-cell>
          <table:table-cell office:value-type="string" calcext:value-type="string">
            <text:p>2.3.1</text:p>
          </table:table-cell>
          <table:table-cell office:value-type="string" calcext:value-type="string">
            <text:p>Regular Expression Denial of Service in brace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8">
          <table:table-cell office:value-type="string" calcext:value-type="string">
            <text:p>braces (1.8.5)</text:p>
          </table:table-cell>
          <table:table-cell office:value-type="string" calcext:value-type="string">
            <text:p><text:a xlink:href="https://github.com/advisories/GHSA-grv7-fg5c-xmjg" xlink:type="simple">GHSA-grv7-fg5c-xmjg</text:a></text:p>
          </table:table-cell>
          <table:table-cell office:value-type="string" calcext:value-type="string">
            <text:p>High</text:p>
          </table:table-cell>
          <table:table-cell office:value-type="string" calcext:value-type="string">
            <text:p>3.0.3</text:p>
          </table:table-cell>
          <table:table-cell office:value-type="string" calcext:value-type="string">
            <text:p>Uncontrolled resource consumption in brace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30">
          <table:table-cell office:value-type="string" calcext:value-type="string">
            <text:p>braces (1.8.5)</text:p>
          </table:table-cell>
          <table:table-cell office:value-type="string" calcext:value-type="string">
            <text:p><text:a xlink:href="https://cve.mitre.org/cgi-bin/cvename.cgi?name=CVE-2018-1109" xlink:type="simple">CVE-2018-1109</text:a></text:p>
          </table:table-cell>
          <table:table-cell office:value-type="string" calcext:value-type="string">
            <text:p>Medium</text:p>
          </table:table-cell>
          <table:table-cell table:style-name="ce4"/>
          <table:table-cell office:value-type="string" calcext:value-type="string">
            <text:p>A vulnerability was found in Braces versions prior to 2.3.1. Affected versions of this package are vulnerable to Regular Expression Denial of Service (ReDoS) attacks.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22">
          <table:table-cell office:value-type="string" calcext:value-type="string">
            <text:p>brace-expansion (https://registry.npmjs.org/brace-expansion/-/brace-expansion-1.1.8.tgz)</text:p>
          </table:table-cell>
          <table:table-cell office:value-type="string" calcext:value-type="string">
            <text:p><text:a xlink:href="https://github.com/advisories/GHSA-832h-xg76-4gv6" xlink:type="simple">GHSA-832h-xg76-4gv6</text:a></text:p>
          </table:table-cell>
          <table:table-cell office:value-type="string" calcext:value-type="string">
            <text:p>High</text:p>
          </table:table-cell>
          <table:table-cell office:value-type="string" calcext:value-type="string">
            <text:p>1.1.7</text:p>
          </table:table-cell>
          <table:table-cell office:value-type="string" calcext:value-type="string">
            <text:p>ReDoS in brace-expansion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24">
          <table:table-cell office:value-type="string" calcext:value-type="string">
            <text:p>babel-traverse (6.26.0)</text:p>
          </table:table-cell>
          <table:table-cell office:value-type="string" calcext:value-type="string">
            <text:p><text:a xlink:href="https://github.com/advisories/GHSA-67hx-6x53-jw92" xlink:type="simple">GHSA-67hx-6x53-jw92</text:a></text:p>
          </table:table-cell>
          <table:table-cell office:value-type="string" calcext:value-type="string">
            <text:p>Critical</text:p>
          </table:table-cell>
          <table:table-cell table:style-name="ce4"/>
          <table:table-cell office:value-type="string" calcext:value-type="string">
            <text:p>Babel vulnerable to arbitrary code execution when compiling specifically crafted malicious code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30">
          <table:table-cell office:value-type="string" calcext:value-type="string">
            <text:p>async (https://registry.npmjs.org/async/-/async-1.5.2.tgz)</text:p>
          </table:table-cell>
          <table:table-cell office:value-type="string" calcext:value-type="string">
            <text:p><text:a xlink:href="https://cve.mitre.org/cgi-bin/cvename.cgi?name=CVE-2021-43138" xlink:type="simple">CVE-2021-43138</text:a></text:p>
          </table:table-cell>
          <table:table-cell office:value-type="string" calcext:value-type="string">
            <text:p>High</text:p>
          </table:table-cell>
          <table:table-cell table:style-name="ce4"/>
          <table:table-cell office:value-type="string" calcext:value-type="string">
            <text:p>In Async before 2.6.4 and 3.x before 3.2.2, a malicious user can obtain privileges via the mapValues() method, aka lib/internal/iterator.js createObjectIterator prototype pollution.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32">
          <table:table-cell office:value-type="string" calcext:value-type="string">
            <text:p>ajv (5.2.3)</text:p>
          </table:table-cell>
          <table:table-cell office:value-type="string" calcext:value-type="string">
            <text:p><text:a xlink:href="https://github.com/advisories/GHSA-v88g-cgmw-v5xw" xlink:type="simple">GHSA-v88g-cgmw-v5xw</text:a></text:p>
          </table:table-cell>
          <table:table-cell office:value-type="string" calcext:value-type="string">
            <text:p>Medium</text:p>
          </table:table-cell>
          <table:table-cell office:value-type="string" calcext:value-type="string">
            <text:p>6.12.3</text:p>
          </table:table-cell>
          <table:table-cell office:value-type="string" calcext:value-type="string">
            <text:p>Prototype Pollution in Ajv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printable-characters/package-lock.json</text:a></text:p>
          </table:table-cell>
        </table:table-row>
        <table:table-row table:style-name="ro24">
          <table:table-cell office:value-type="string" calcext:value-type="string">
            <text:p>@babel/traverse (7.16.7)</text:p>
          </table:table-cell>
          <table:table-cell office:value-type="string" calcext:value-type="string">
            <text:p><text:a xlink:href="https://github.com/advisories/GHSA-67hx-6x53-jw92" xlink:type="simple">GHSA-67hx-6x53-jw92</text:a></text:p>
          </table:table-cell>
          <table:table-cell office:value-type="string" calcext:value-type="string">
            <text:p>Critical</text:p>
          </table:table-cell>
          <table:table-cell office:value-type="string" calcext:value-type="string">
            <text:p>7.23.2</text:p>
          </table:table-cell>
          <table:table-cell office:value-type="string" calcext:value-type="string">
            <text:p>Babel vulnerable to arbitrary code execution when compiling specifically crafted malicious code Found in: <text:a xlink:href="vscode-webview://1osf1c702pltvfutckr2oheo97tldcbnlng7ognil80e0vlv424j/index.html?id=2a1fcceb-ef38-48b7-8c84-a72e4ae4e33b&amp;parentId=7&amp;origin=0e7144e1-300e-4703-bbf7-faeb4f41b5ed&amp;swVersion=5&amp;extensionId=anchoreinc.grype-vscode&amp;platform=electron&amp;vscode-resource-base-authority=vscode-resource.vscode-cdn.net&amp;parentOrigin=vscode-file%3A%2F%2Fvscode-app#" xlink:type="simple">/Users/danielgoldstein/Documents/VibeCoding/Vultr-API-skill/skills/vultr-api/lint/node_modules/node-sarif-builder/yarn.lock</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7T21:02:02.229108071</meta:creation-date>
    <dc:date>2026-05-27T21:02:25.401482145</dc:date>
    <meta:editing-duration>PT23S</meta:editing-duration>
    <meta:editing-cycles>1</meta:editing-cycles>
    <meta:document-statistic meta:table-count="1" meta:cell-count="515" meta:object-count="0"/>
    <meta:generator>LibreOffice/24.8.3.2$MacOSX_AARCH64 LibreOffice_project/48a6bac9e7e268aeb4c3483fcf825c94556d9f92</meta:generator>
    <meta:user-defined meta:name=""/>
  </office:meta>
</office:document-meta>
</file>